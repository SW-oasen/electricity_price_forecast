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22300000147DC2B70A7.png"/>
  <manifest:file-entry manifest:media-type="image/png" manifest:full-path="Pictures/100000000000022300000147BF48D456.png"/>
  <manifest:file-entry manifest:media-type="image/png" manifest:full-path="Pictures/100000000000069B000002B296BCF644.png"/>
  <manifest:file-entry manifest:media-type="image/png" manifest:full-path="Pictures/1000000000000223000001476B8B6394.png"/>
  <manifest:file-entry manifest:media-type="image/png" manifest:full-path="Pictures/1000000000000320000002580E1B1ACF.png"/>
  <manifest:file-entry manifest:media-type="" manifest:full-path="Pictures/TablePreview1.svm"/>
  <manifest:file-entry manifest:media-type="image/png" manifest:full-path="Pictures/100000000000032000000258CE27E50E.png"/>
  <manifest:file-entry manifest:media-type="image/png" manifest:full-path="Pictures/10000201000009700000049D622FC05E.png"/>
  <manifest:file-entry manifest:media-type="image/png" manifest:full-path="Pictures/100002010000091A000003D78FD37A80.png"/>
  <manifest:file-entry manifest:media-type="image/png" manifest:full-path="Pictures/10000000000003200000025871EEE600.png"/>
  <manifest:file-entry manifest:media-type="image/png" manifest:full-path="Pictures/1000000000000276000001D5F8E3FC95.png"/>
  <manifest:file-entry manifest:media-type="image/png" manifest:full-path="Pictures/1000000000000366000001E14FD93590.png"/>
  <manifest:file-entry manifest:media-type="image/png" manifest:full-path="Pictures/10000000000003200000025830674EDA.png"/>
  <manifest:file-entry manifest:media-type="image/png" manifest:full-path="Pictures/100000000000032000000258217E47D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kt_20_ohne_20_Füllung_20_und_20_ohne_20_Linie">
      <style:graphic-properties draw:textarea-vertical-align="middle" draw:ole-draw-aspect="1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2.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671cm"/>
    </style:style>
    <style:style style:name="pr4" style:family="presentation" style:parent-style-name="Standard-outline1">
      <style:graphic-properties fo:min-height="10.559cm"/>
    </style:style>
    <style:style style:name="pr5" style:family="presentation" style:parent-style-name="Standard-outline1">
      <style:graphic-properties draw:auto-grow-height="true" fo:min-height="10.559cm"/>
    </style:style>
    <style:style style:name="pr6" style:family="presentation" style:parent-style-name="Standard-outline1">
      <style:graphic-properties fo:min-height="10.997cm"/>
    </style:style>
    <style:style style:name="pr7" style:family="presentation" style:parent-style-name="Standard-outline1">
      <style:graphic-properties draw:auto-grow-height="true" fo:min-height="6.416cm"/>
    </style:style>
    <style:style style:name="pr8" style:family="presentation" style:parent-style-name="Standard-outline1">
      <style:graphic-properties fo:min-height="5.739cm"/>
    </style:style>
    <style:style style:name="pr9" style:family="presentation" style:parent-style-name="Standard-outline1">
      <style:graphic-properties fo:min-height="4.234cm"/>
    </style:style>
    <style:style style:name="co1" style:family="table-column">
      <style:table-column-properties style:column-width="5.588cm" style:use-optimal-column-width="false"/>
    </style:style>
    <style:style style:name="co2" style:family="table-column">
      <style:table-column-properties style:column-width="4.663cm" style:use-optimal-column-width="false"/>
    </style:style>
    <style:style style:name="co3" style:family="table-column">
      <style:table-column-properties style:column-width="4.466cm" style:use-optimal-column-width="false"/>
    </style:style>
    <style:style style:name="co4" style:family="table-column">
      <style:table-column-properties style:column-width="4.715cm" style:use-optimal-column-width="false"/>
    </style:style>
    <style:style style:name="co5" style:family="table-column">
      <style:table-column-properties style:column-width="6.698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>
      <style:graphic-properties style:repeat="repeat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6.90000009536743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ffff" fo:font-size="13.6999998092651pt" fo:font-weight="bold" style:font-size-asian="13pt" style:font-weight-asian="bold" style:font-size-complex="13pt" style:font-weight-complex="bold"/>
    </style:style>
    <style:style style:name="T12" style:family="text">
      <style:text-properties fo:font-size="13.6999998092651pt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1.372cm" svg:height="1.524cm" svg:x="5.468cm" svg:y="6.47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1" draw:text-style-name="P1" draw:layer="layout" svg:width="28.799cm" svg:height="12.3cm" svg:x="1.601cm" svg:y="2.742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Stromverbrauch Vorhersagen</text:span></text:p>
            <text:p text:style-name="P1"><text:span text:style-name="T2">Machine Learning für den stündlichen Stromverbrauch in Deutschland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2"><text:span text:style-name="T4">Yuchuan Liu, 20.5.202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Projektziel <text:s/>- <text:s/>ML-Ablauf</text:p>
          </draw:text-box>
        </draw:frame>
        <draw:custom-shape draw:style-name="gr3" draw:text-style-name="P4" draw:layer="layout" svg:width="3.81cm" svg:height="1.206cm" svg:x="17.497cm" svg:y="8.907cm">
          <text:p text:style-name="P1"><text:span text:style-name="T5">Historische Wetterdaten</text:span></text:p>
          <text:p text:style-name="P1"><text:span text:style-name="T5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74cm" svg:height="1.757cm" svg:x="18.936cm" svg:y="4.352cm">
          <text:p text:style-name="P1"><text:span text:style-name="T5">trainiere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774cm" svg:height="1.757cm" svg:x="25.44cm" svg:y="4.285cm">
          <text:p text:style-name="P1"><text:span text:style-name="T5">vorhersage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5" draw:text-style-name="P4" draw:layer="layout" svg:width="3.703cm" svg:height="1.227cm" svg:x="17.634cm" svg:y="7.193cm">
          <text:p text:style-name="P1"><text:span text:style-name="T5">EU Electricity Load</text:span></text:p>
          <text:p text:style-name="P1"><text:span text:style-name="T5">Kaggle 2019 – 2025</text:span></text:p>
        </draw:rect>
        <draw:custom-shape draw:style-name="gr3" draw:text-style-name="P6" draw:layer="layout" svg:width="2.985cm" svg:height="2.095cm" svg:x="15.782cm" svg:y="4.293cm">
          <text:p text:style-name="P1"><text:span text:style-name="T6">Training-Daten </text:span></text:p>
          <text:p text:style-name="P1"><text:span text:style-name="T6">aufbereit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6" draw:text-style-name="P1" draw:layer="layout" svg:width="1.015cm" svg:height="3.111cm" svg:x="16.481cm" svg:y="6.409cm" svg:viewBox="0 0 1016 3112" draw:points="0,0 0,3112 1016,3112">
          <text:p/>
        </draw:polyline>
        <draw:line draw:style-name="gr6" draw:text-style-name="P1" draw:layer="layout" svg:x1="16.481cm" svg:y1="7.827cm" svg:x2="17.634cm" svg:y2="7.827cm">
          <text:p/>
        </draw:line>
        <draw:custom-shape draw:style-name="gr3" draw:text-style-name="P4" draw:layer="layout" svg:width="3.81cm" svg:height="1.206cm" svg:x="17.497cm" svg:y="8.908cm">
          <text:p text:style-name="P1"><text:span text:style-name="T5">Historische Wetterdaten</text:span></text:p>
          <text:p text:style-name="P1"><text:span text:style-name="T5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703cm" svg:height="1.227cm" svg:x="17.634cm" svg:y="7.194cm">
          <text:p text:style-name="P1"><text:span text:style-name="T5">EU Electricity Load</text:span></text:p>
          <text:p text:style-name="P1"><text:span text:style-name="T5">Kaggle 2019 – 2025</text:span></text:p>
        </draw:rect>
        <draw:polyline draw:style-name="gr6" draw:text-style-name="P1" draw:layer="layout" svg:width="1.015cm" svg:height="3.111cm" svg:x="16.481cm" svg:y="6.41cm" svg:viewBox="0 0 1016 3112" draw:points="0,0 0,3112 1016,3112">
          <text:p/>
        </draw:polyline>
        <draw:line draw:style-name="gr6" draw:text-style-name="P1" draw:layer="layout" svg:x1="16.481cm" svg:y1="7.828cm" svg:x2="17.634cm" svg:y2="7.828cm">
          <text:p/>
        </draw:line>
        <draw:custom-shape draw:style-name="gr3" draw:text-style-name="P7" draw:layer="layout" svg:width="2.455cm" svg:height="1.888cm" svg:x="22.81cm" svg:y="4.252cm">
          <text:p text:style-name="P1"><text:span text:style-name="T7">Model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6" draw:layer="layout" svg:width="3.429cm" svg:height="2.095cm" svg:x="23.677cm" svg:y="7.002cm">
          <text:p text:style-name="P1"><text:span text:style-name="T6">Vorhersage-Daten </text:span></text:p>
          <text:p text:style-name="P1"><text:span text:style-name="T6">aufbereit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draw:layer="layout" svg:width="3.81cm" svg:height="1.206cm" svg:x="25.414cm" svg:y="11.595cm">
          <text:p text:style-name="P1"><text:span text:style-name="T5">Historische Wetterdaten</text:span></text:p>
          <text:p text:style-name="P1"><text:span text:style-name="T5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" draw:text-style-name="P1" draw:layer="layout" svg:width="1.015cm" svg:height="3.111cm" svg:x="24.398cm" svg:y="9.097cm" svg:viewBox="0 0 1016 3112" draw:points="0,0 0,3112 1016,3112">
          <text:p/>
        </draw:polyline>
        <draw:line draw:style-name="gr6" draw:text-style-name="P1" draw:layer="layout" svg:x1="24.398cm" svg:y1="10.515cm" svg:x2="25.551cm" svg:y2="10.515cm">
          <text:p/>
        </draw:line>
        <draw:custom-shape draw:style-name="gr3" draw:text-style-name="P4" draw:layer="layout" svg:width="3.81cm" svg:height="1.206cm" svg:x="25.414cm" svg:y="11.596cm">
          <text:p text:style-name="P1"><text:span text:style-name="T5">Wetter-Vorherage</text:span></text:p>
          <text:p text:style-name="P1"><text:span text:style-name="T5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" draw:text-style-name="P1" draw:layer="layout" svg:width="1.015cm" svg:height="3.111cm" svg:x="24.398cm" svg:y="9.098cm" svg:viewBox="0 0 1016 3112" draw:points="0,0 0,3112 1016,3112">
          <text:p/>
        </draw:polyline>
        <draw:line draw:style-name="gr6" draw:text-style-name="P1" draw:layer="layout" svg:x1="24.398cm" svg:y1="10.516cm" svg:x2="25.551cm" svg:y2="10.516cm">
          <text:p/>
        </draw:line>
        <draw:custom-shape draw:style-name="gr3" draw:text-style-name="P4" draw:layer="layout" svg:width="3.81cm" svg:height="1.206cm" svg:x="25.543cm" svg:y="9.896cm">
          <text:p text:style-name="P1"><text:span text:style-name="T5">Stromverbrauch</text:span></text:p>
          <text:p text:style-name="P1"><text:span text:style-name="T5">SM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14.053cm" svg:height="10.559cm" svg:x="1.256cm" svg:y="3.744cm" presentation:class="outline" presentation:user-transformed="true">
          <draw:text-box>
            <text:p><text:span text:style-name="T2">Stündlicher Stromverbrauch in Deutschland anhand der historischen Daten und der Wettervorhersage vorhersage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Marktdaten</text:p>
          </draw:text-box>
        </draw:frame>
        <draw:frame presentation:style-name="pr4" draw:text-style-name="P8" draw:layer="layout" svg:width="16cm" svg:height="10.559cm" svg:x="1.6cm" svg:y="3.744cm" presentation:class="outline" presentation:user-transformed="true">
          <draw:text-box>
            <text:p><text:span text:style-name="T2">Stromverbrauchanteil 2025 in %</text:span></text:p>
            <text:p><text:span text:style-name="T6">* Quelle: de.statista.com</text:span></text:p>
          </draw:text-box>
        </draw:frame>
        <draw:frame draw:style-name="gr7" draw:text-style-name="P1" draw:layer="layout" svg:width="10.118cm" svg:height="5.131cm" svg:x="1.478cm" svg:y="6.21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presentation:style-name="pr4" draw:text-style-name="P9" draw:layer="layout" svg:width="14.609cm" svg:height="10.559cm" svg:x="15.854cm" svg:y="3.764cm" presentation:class="outline" presentation:user-transformed="true">
          <draw:text-box>
            <text:list text:style-name="L1">
              <text:list-item>
                <text:p><text:span text:style-name="T4">Einflussfaktoren</text:span></text:p>
                <text:list>
                  <text:list-item>
                    <text:p><text:span text:style-name="T4">Zeit</text:span></text:p>
                    <text:list>
                      <text:list-item>
                        <text:p><text:span text:style-name="T4">Saisonzyklen</text:span></text:p>
                      </text:list-item>
                      <text:list-item>
                        <text:p><text:span text:style-name="T4">Feiertage </text:span></text:p>
                      </text:list-item>
                    </text:list>
                  </text:list-item>
                  <text:list-item>
                    <text:p><text:span text:style-name="T4">Wetter</text:span></text:p>
                    <text:list>
                      <text:list-item>
                        <text:p><text:span text:style-name="T4">Temperatur</text:span></text:p>
                      </text:list-item>
                      <text:list-item>
                        <text:p><text:span text:style-name="T4">Sonnenstralung</text:span></text:p>
                      </text:list-item>
                      <text:list-item>
                        <text:p><text:span text:style-name="T4">Wind</text:span></text:p>
                      </text:list-item>
                      <text:list-item>
                        <text:p><text:span text:style-name="T4">Regen oder Schnee</text:span></text:p>
                      </text:list-item>
                    </text:list>
                  </text:list-item>
                  <text:list-item>
                    <text:p><text:span text:style-name="T4">Konjunktur</text:span></text:p>
                    <text:list>
                      <text:list-item>
                        <text:p><text:span text:style-name="T4">Nur Langzeitwirk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EDA – Stromverbrauch Wetter </text:p>
          </draw:text-box>
        </draw:frame>
        <draw:frame draw:style-name="gr8" draw:text-style-name="P1" draw:layer="layout" svg:width="12cm" svg:height="6.64cm" svg:x="1.538cm" svg:y="3.464cm">
          <draw:image xlink:href="Pictures/1000000000000366000001E14FD93590.png" xlink:type="simple" xlink:show="embed" xlink:actuate="onLoad">
            <text:p/>
          </draw:image>
        </draw:frame>
        <draw:frame draw:style-name="gr8" draw:text-style-name="P1" draw:layer="layout" svg:width="10cm" svg:height="7.45cm" svg:x="15.118cm" svg:y="3.511cm">
          <draw:image xlink:href="Pictures/1000000000000276000001D5F8E3FC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Datenaufbereitung</text:p>
          </draw:text-box>
        </draw:frame>
        <draw:frame presentation:style-name="pr5" draw:text-style-name="P9" draw:layer="layout" svg:width="14.053cm" svg:height="10.559cm" svg:x="1.6cm" svg:y="3.744cm" presentation:class="outline">
          <draw:text-box>
            <text:p><text:span text:style-name="T8">Selektion</text:span></text:p>
            <text:list text:style-name="L1">
              <text:list-item>
                <text:p><text:span text:style-name="T4">Landselektion – Deutschland (DE) </text:span></text:p>
              </text:list-item>
              <text:list-item>
                <text:p><text:span text:style-name="T4">Relevante Wettervariablen: </text:span></text:p>
                <text:list>
                  <text:list-item>
                    <text:p><text:span text:style-name="T4">Temperatur, Niederschlag, Windgeschwindigkeit, Sonnenstrahlung</text:span></text:p>
                  </text:list-item>
                </text:list>
              </text:list-item>
              <text:list-item>
                <text:p><text:span text:style-name="T4">Wettervariablen gemittelt mit der Population der 5 größten Städte als Gewicht</text:span></text:p>
                <text:list>
                  <text:list-item>
                    <text:p><text:span text:style-name="T4">Berlin, Hamburg, München, Köln, Frankfurt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4.053cm" svg:height="10.997cm" svg:x="16.356cm" svg:y="3.744cm" presentation:class="outline" presentation:user-transformed="true">
          <draw:text-box>
            <text:p><text:span text:style-name="T8">Feature Engineering</text:span></text:p>
            <text:list text:style-name="L1">
              <text:list-item>
                <text:p><text:span text:style-name="T4">Zeit basierte Features</text:span></text:p>
                <text:list>
                  <text:list-item>
                    <text:p><text:span text:style-name="T4">Year, month, weekday, is_weekend, is_holiday, holiday_ratio(Länderanteil), holiday_weight(Brückentag), <text:s/>is_pandemic_time</text:span></text:p>
                  </text:list-item>
                </text:list>
              </text:list-item>
              <text:list-item>
                <text:p><text:span text:style-name="T4">Wetter basierte Features</text:span></text:p>
                <text:list>
                  <text:list-item>
                    <text:p><text:span text:style-name="T4">heating_degree, cooling_degree</text:span></text:p>
                  </text:list-item>
                </text:list>
              </text:list-item>
              <text:list-item>
                <text:p><text:span text:style-name="T4">Zeitreihen – lag und rolling, Tag und Woche</text:span></text:p>
                <text:list>
                  <text:list-item>
                    <text:p><text:span text:style-name="T4">EnergyDemand </text:span></text:p>
                  </text:list-item>
                  <text:list-item>
                    <text:p><text:span text:style-name="T4">apparent_temperature, shortwave_rad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Modelle Tuning - <text:span text:style-name="T9">Bayesian Optimazition</text:span></text:p>
          </draw:text-box>
        </draw:frame>
        <draw:frame draw:style-name="standard" draw:layer="layout" svg:width="26.129cm" svg:height="3.911cm" svg:x="2.897cm" svg:y="3.9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0">Modell</text:span></text:p>
              </table:table-cell>
              <table:table-cell>
                <text:p text:style-name="P1"><text:span text:style-name="T11">MAE</text:span></text:p>
              </table:table-cell>
              <table:table-cell>
                <text:p text:style-name="P1"><text:span text:style-name="T11">RMSE</text:span></text:p>
              </table:table-cell>
              <table:table-cell>
                <text:p text:style-name="P1"><text:span text:style-name="T11">R²</text:span></text:p>
              </table:table-cell>
              <table:table-cell>
                <text:p text:style-name="P1"><text:span text:style-name="T11">Train duration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2">LightGBM</text:span></text:p>
              </table:table-cell>
              <table:table-cell>
                <text:p text:style-name="P1"><text:span text:style-name="T13">1200.53</text:span></text:p>
              </table:table-cell>
              <table:table-cell>
                <text:p text:style-name="P1"><text:span text:style-name="T13">1564.07</text:span></text:p>
              </table:table-cell>
              <table:table-cell>
                <text:p text:style-name="P1"><text:span text:style-name="T12">0.97</text:span></text:p>
              </table:table-cell>
              <table:table-cell>
                <text:p text:style-name="P1"><text:span text:style-name="T12">2'2''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3">XGBoost</text:span></text:p>
              </table:table-cell>
              <table:table-cell>
                <text:p text:style-name="P1"><text:span text:style-name="T13">1104.65</text:span></text:p>
              </table:table-cell>
              <table:table-cell>
                <text:p text:style-name="P1"><text:span text:style-name="T13">1424.16</text:span></text:p>
              </table:table-cell>
              <table:table-cell>
                <text:p text:style-name="P1"><text:span text:style-name="T13">0.97</text:span></text:p>
              </table:table-cell>
              <table:table-cell table:style-name="ce3">
                <text:p text:style-name="P1"><text:span text:style-name="T13">4'10''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3">Random Forest</text:span></text:p>
              </table:table-cell>
              <table:table-cell>
                <text:p text:style-name="P1"><text:span text:style-name="T13">1247.01</text:span></text:p>
              </table:table-cell>
              <table:table-cell>
                <text:p text:style-name="P1"><text:span text:style-name="T13">1626.03</text:span></text:p>
              </table:table-cell>
              <table:table-cell>
                <text:p text:style-name="P1"><text:span text:style-name="T13">0.97</text:span></text:p>
              </table:table-cell>
              <table:table-cell>
                <text:p text:style-name="P1"><text:span text:style-name="T13">21'25''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" draw:layer="layout" svg:width="9cm" svg:height="5.38cm" svg:x="1.867cm" svg:y="8.571cm">
          <draw:image xlink:href="Pictures/100000000000022300000147DC2B70A7.png" xlink:type="simple" xlink:show="embed" xlink:actuate="onLoad">
            <text:p/>
          </draw:image>
        </draw:frame>
        <draw:frame draw:style-name="gr8" draw:text-style-name="P1" draw:layer="layout" svg:width="9cm" svg:height="5.38cm" svg:x="11.167cm" svg:y="8.441cm">
          <draw:image xlink:href="Pictures/100000000000022300000147BF48D456.png" xlink:type="simple" xlink:show="embed" xlink:actuate="onLoad">
            <text:p/>
          </draw:image>
        </draw:frame>
        <draw:frame draw:style-name="gr8" draw:text-style-name="P1" draw:layer="layout" svg:width="9cm" svg:height="5.38cm" svg:x="20.573cm" svg:y="8.386cm">
          <draw:image xlink:href="Pictures/1000000000000223000001476B8B63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Feature Importances – <text:span text:style-name="T14">Permutation MAE</text:span></text:p>
          </draw:text-box>
        </draw:frame>
        <draw:frame draw:style-name="gr8" draw:text-style-name="P1" draw:layer="layout" svg:width="28cm" svg:height="11.42cm" svg:x="1.893cm" svg:y="3.308cm">
          <draw:image xlink:href="Pictures/100000000000069B000002B296BCF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Vorhersage GUI - morgen</text:p>
          </draw:text-box>
        </draw:frame>
        <draw:frame draw:style-name="gr9" draw:text-style-name="P1" draw:layer="layout" svg:width="25cm" svg:height="10.55cm" svg:x="3.501cm" svg:y="3.464cm">
          <draw:image xlink:href="Pictures/100002010000091A000003D78FD37A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Vorhersage vs realer Verbrauch</text:p>
          </draw:text-box>
        </draw:frame>
        <draw:frame draw:style-name="gr9" draw:text-style-name="P1" draw:layer="layout" svg:width="25cm" svg:height="12.22cm" svg:x="3.328cm" svg:y="2.909cm">
          <draw:image xlink:href="Pictures/10000201000009700000049D622FC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3">
        <office:forms form:automatic-focus="false" form:apply-design-mode="false"/>
        <draw:frame presentation:style-name="pr3" draw:layer="layout" svg:width="28.799cm" svg:height="2.671cm" svg:x="1.6cm" svg:y="0.637cm" presentation:class="title">
          <draw:text-box>
            <text:p>Fazit</text:p>
          </draw:text-box>
        </draw:frame>
        <draw:frame presentation:style-name="pr7" draw:text-style-name="P10" draw:layer="layout" svg:width="14.053cm" svg:height="6.416cm" svg:x="1.6cm" svg:y="3.744cm" presentation:class="outline" presentation:user-transformed="true">
          <draw:text-box>
            <text:list text:style-name="L1">
              <text:list-item>
                <text:p><text:span text:style-name="T7">Befund</text:span></text:p>
                <text:list>
                  <text:list-item>
                    <text:p><text:span text:style-name="T7">Der kurzfristige künftige Stromverbrauch hängt stark von den vorangegangenen/historischen Werten ab</text:span></text:p>
                  </text:list-item>
                  <text:list-item>
                    <text:p><text:span text:style-name="T7">Zeitlichen Faktor - arbeitsfreie Tage (Feiertage, Wochenende und Brückentage) spielen auch eine wichtige Rolle. Dies bestätigt die Verteilung des Marktes</text:span></text:p>
                  </text:list-item>
                  <text:list-item>
                    <text:p><text:span text:style-name="T7">Wetter beeinflusst den gesamten Verbrauch nur geringfügig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8" draw:text-style-name="P10" draw:layer="layout" svg:width="14.053cm" svg:height="5.739cm" svg:x="16.356cm" svg:y="3.744cm" presentation:class="outline" presentation:user-transformed="true">
          <draw:text-box>
            <text:list text:style-name="L1">
              <text:list-item>
                <text:p><text:span text:style-name="T7">Schlussfolgerung</text:span></text:p>
              </text:list-item>
              <text:list-item>
                <text:p><text:span text:style-name="T7">Langzeit-Vorhersage benötigt anderen Daten und Modelle</text:span></text:p>
              </text:list-item>
            </text:list>
          </draw:text-box>
        </draw:frame>
        <draw:frame presentation:style-name="pr9" draw:text-style-name="P10" draw:layer="layout" svg:width="27.005cm" svg:height="4.234cm" svg:x="1.6cm" svg:y="11.007cm" presentation:class="outline" presentation:user-transformed="true">
          <draw:text-box>
            <text:list text:style-name="L1">
              <text:list-item>
                <text:p text:style-name="P10"><text:span text:style-name="T7">Folgeprojekt</text:span></text:p>
                <text:list>
                  <text:list-item>
                    <text:p text:style-name="P10"><text:span text:style-name="T7">Residuallast-Vorhersage: Residuallast=Netzlast−PV−Wind Onshore - konventionelle Erzeug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/>
      <style:text-properties style:use-window-font-color="true" style:text-outline="false" style:text-line-through-style="none" fo:font-family="Arial" style:font-family-generic="roman" style:font-pitch="variable" fo:font-size="24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04cm" fo:text-indent="0cm"/>
      <style:text-properties fo:font-size="21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8cm" fo:text-indent="0cm"/>
      <style:text-properties fo:font-size="18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52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6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6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6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6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6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style:use-window-font-color="true" style:text-outline="false" style:text-line-through-style="none" fo:font-family="Albany" style:font-family-generic="roman" style:font-pitch="variable" fo:font-size="24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bluetitledown-outline3" style:family="presentation" style:parent-style-name="lyt-bluetitledown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bluetitledown-outline4" style:family="presentation" style:parent-style-name="lyt-bluetitledown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bluetitledown-outline5" style:family="presentation" style:parent-style-name="lyt-bluetitledown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titledown-outline6" style:family="presentation" style:parent-style-name="lyt-bluetitledown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titledown-outline7" style:family="presentation" style:parent-style-name="lyt-bluetitledown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titledown-outline8" style:family="presentation" style:parent-style-name="lyt-bluetitledown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titledown-outline9" style:family="presentation" style:parent-style-name="lyt-bluetitledown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3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fo:color="#ffffff" style:text-outline="false" style:text-line-through-style="none" fo:font-family="Albany" style:font-family-generic="roman" style:font-pitch="variable" fo:font-size="24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bluegrey-outline3" style:family="presentation" style:parent-style-name="lyt-bluegrey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bluegrey-outline4" style:family="presentation" style:parent-style-name="lyt-bluegrey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bluegrey-outline5" style:family="presentation" style:parent-style-name="lyt-bluegrey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grey-outline6" style:family="presentation" style:parent-style-name="lyt-bluegrey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grey-outline7" style:family="presentation" style:parent-style-name="lyt-bluegrey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grey-outline8" style:family="presentation" style:parent-style-name="lyt-bluegrey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grey-outline9" style:family="presentation" style:parent-style-name="lyt-bluegrey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3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fo:color="#ffffff" style:text-outline="false" style:text-line-through-style="none" fo:font-family="Albany" style:font-family-generic="roman" style:font-pitch="variable" fo:font-size="24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frepa-outline3" style:family="presentation" style:parent-style-name="lyt-frepa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frepa-outline4" style:family="presentation" style:parent-style-name="lyt-frepa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frepa-outline5" style:family="presentation" style:parent-style-name="lyt-frepa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frepa-outline6" style:family="presentation" style:parent-style-name="lyt-frepa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frepa-outline7" style:family="presentation" style:parent-style-name="lyt-frepa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frepa-outline8" style:family="presentation" style:parent-style-name="lyt-frepa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frepa-outline9" style:family="presentation" style:parent-style-name="lyt-frepa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3.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style:use-window-font-color="true" style:text-outline="false" style:text-line-through-style="none" fo:font-family="Albany" style:font-family-generic="roman" style:font-pitch="variable" fo:font-size="24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techpoly-outline3" style:family="presentation" style:parent-style-name="lyt-techpoly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techpoly-outline4" style:family="presentation" style:parent-style-name="lyt-techpoly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techpoly-outline5" style:family="presentation" style:parent-style-name="lyt-techpoly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techpoly-outline6" style:family="presentation" style:parent-style-name="lyt-techpoly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techpoly-outline7" style:family="presentation" style:parent-style-name="lyt-techpoly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techpoly-outline8" style:family="presentation" style:parent-style-name="lyt-techpoly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techpoly-outline9" style:family="presentation" style:parent-style-name="lyt-techpoly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35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fo:color="#006b6b" style:text-outline="false" style:text-line-through-style="none" fo:font-family="Albany" style:font-family-generic="roman" style:font-pitch="variable" fo:font-size="24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tunnel-outline3" style:family="presentation" style:parent-style-name="lyt-tunnel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tunnel-outline4" style:family="presentation" style:parent-style-name="lyt-tunnel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tunnel-outline5" style:family="presentation" style:parent-style-name="lyt-tunnel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tunnel-outline6" style:family="presentation" style:parent-style-name="lyt-tunnel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tunnel-outline7" style:family="presentation" style:parent-style-name="lyt-tunnel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tunnel-outline8" style:family="presentation" style:parent-style-name="lyt-tunnel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tunnel-outline9" style:family="presentation" style:parent-style-name="lyt-tunnel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3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lyt-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forest-notes" style:family="presentation">
      <style:graphic-properties draw:stroke="none" draw:fill="none">
        <text:list-style style:name="lyt-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orest-outline1" style:family="presentation">
      <style:graphic-properties draw:stroke="none" draw:fill="none">
        <text:list-style style:name="lyt-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style:use-window-font-color="true" style:text-outline="false" style:text-line-through-style="none" fo:font-family="Arial" style:font-family-generic="roman" style:font-pitch="variable" fo:font-size="24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outline2" style:family="presentation" style:parent-style-name="lyt-forest-outline1">
      <style:paragraph-properties fo:margin-left="1.825cm" fo:margin-right="0cm" fo:margin-top="0cm" fo:margin-bottom="0.304cm" fo:text-indent="-0.608cm"/>
      <style:text-properties fo:font-size="21.2999992370605pt" style:font-size-asian="28pt" style:font-size-complex="28pt"/>
    </style:style>
    <style:style style:name="lyt-forest-outline3" style:family="presentation" style:parent-style-name="lyt-forest-outline2">
      <style:paragraph-properties fo:margin-left="2.736cm" fo:margin-right="0cm" fo:margin-top="0cm" fo:margin-bottom="0.226cm" fo:text-indent="-0.455cm"/>
      <style:text-properties fo:font-size="18.2999992370605pt" style:font-size-asian="24pt" style:font-size-complex="24pt"/>
    </style:style>
    <style:style style:name="lyt-forest-outline4" style:family="presentation" style:parent-style-name="lyt-forest-outline3">
      <style:paragraph-properties fo:margin-left="3.644cm" fo:margin-right="0cm" fo:margin-top="0cm" fo:margin-bottom="0.15cm" fo:text-indent="-0.454cm"/>
      <style:text-properties fo:font-size="15.1999998092651pt" style:font-size-asian="20pt" style:font-size-complex="20pt"/>
    </style:style>
    <style:style style:name="lyt-forest-outline5" style:family="presentation" style:parent-style-name="lyt-forest-outline4">
      <style:paragraph-properties fo:margin-left="4.555cm" fo:margin-right="0cm" fo:margin-top="0cm" fo:margin-bottom="0.074cm" fo:text-indent="-0.454cm"/>
      <style:text-properties fo:font-size="15.1999998092651pt" style:font-size-asian="20pt" style:font-size-complex="20pt"/>
    </style:style>
    <style:style style:name="lyt-forest-outline6" style:family="presentation" style:parent-style-name="lyt-forest-outline5">
      <style:paragraph-properties fo:margin-left="5.467cm" fo:margin-right="0cm" fo:margin-top="0cm" fo:margin-bottom="0.074cm" fo:text-indent="-0.454cm"/>
      <style:text-properties fo:font-size="15.1999998092651pt" style:font-size-asian="20pt" style:font-size-complex="20pt"/>
    </style:style>
    <style:style style:name="lyt-forest-outline7" style:family="presentation" style:parent-style-name="lyt-forest-outline6">
      <style:paragraph-properties fo:margin-left="6.38cm" fo:margin-right="0cm" fo:margin-top="0cm" fo:margin-bottom="0.074cm" fo:text-indent="-0.454cm"/>
      <style:text-properties fo:font-size="15.1999998092651pt" style:font-size-asian="20pt" style:font-size-complex="20pt"/>
    </style:style>
    <style:style style:name="lyt-forest-outline8" style:family="presentation" style:parent-style-name="lyt-forest-outline7">
      <style:paragraph-properties fo:margin-left="7.291cm" fo:margin-right="0cm" fo:margin-top="0cm" fo:margin-bottom="0.074cm" fo:text-indent="-0.454cm"/>
      <style:text-properties fo:font-size="15.1999998092651pt" style:font-size-asian="20pt" style:font-size-complex="20pt"/>
    </style:style>
    <style:style style:name="lyt-forest-outline9" style:family="presentation" style:parent-style-name="lyt-forest-outline8">
      <style:paragraph-properties fo:margin-left="8.202cm" fo:margin-right="0cm" fo:margin-top="0cm" fo:margin-bottom="0.074cm" fo:text-indent="-0.454cm"/>
      <style:text-properties fo:font-size="15.1999998092651pt" style:font-size-asian="20pt" style:font-size-complex="20pt"/>
    </style:style>
    <style:style style:name="lyt-forest-subtitle" style:family="presentation">
      <style:graphic-properties draw:stroke="none" draw:fill="none" draw:textarea-vertical-align="middle">
        <text:list-style style:name="lyt-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title" style:family="presentation">
      <style:graphic-properties draw:stroke="none" draw:fill="none" draw:textarea-vertical-align="middle">
        <text:list-style style:name="lyt-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blendscreen2" draw:fill-image-width="0cm" draw:fill-image-height="0cm"/>
    </style:style>
    <style:style style:name="Mdp6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7" style:family="drawing-page">
      <style:drawing-page-properties draw:background-size="border" draw:fill="bitmap" draw:fill-image-name="forest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fores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fores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2.671cm" svg:x="1.6cm" svg:y="0.637cm" presentation:class="title" presentation:placeholder="true">
        <draw:text-box/>
      </draw:frame>
      <draw:frame presentation:style-name="Standard-outline1" draw:layer="backgroundobjects" svg:width="28.799cm" svg:height="10.559cm" svg:x="1.6cm" svg:y="3.744cm" presentation:class="outline" presentation:placeholder="true">
        <draw:text-box/>
      </draw:frame>
      <draw:frame presentation:style-name="Mpr1" draw:text-style-name="MP1" draw:layer="backgroundobjects" svg:width="7.455cm" svg:height="1.103cm" svg:x="1.6cm" svg:y="14.5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103cm" svg:x="10.944cm" svg:y="14.5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103cm" svg:x="22.944cm" svg:y="14.576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8.799cm" svg:height="2.672cm" svg:x="1.6cm" svg:y="13.175cm" presentation:class="title" presentation:placeholder="true">
        <draw:text-box/>
      </draw:frame>
      <draw:frame presentation:style-name="lyt-bluetitledown-outline1" draw:layer="backgroundobjects" svg:width="28.799cm" svg:height="8.762cm" svg:x="1.6cm" svg:y="1.676cm" presentation:class="outline" presentation:placeholder="true">
        <draw:text-box/>
      </draw:frame>
      <draw:frame presentation:style-name="Mpr4" draw:text-style-name="MP4" draw:layer="backgroundobjects" svg:width="7.455cm" svg:height="1.103cm" svg:x="1.6cm" svg:y="11.37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143cm" svg:height="1.103cm" svg:x="10.944cm" svg:y="11.37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455cm" svg:height="1.103cm" svg:x="22.944cm" svg:y="11.37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8.799cm" svg:height="2.672cm" svg:x="1.6cm" svg:y="0.636cm" presentation:class="title" presentation:placeholder="true">
        <draw:text-box/>
      </draw:frame>
      <draw:frame presentation:style-name="lyt-bluegrey-outline1" draw:layer="backgroundobjects" svg:width="28.799cm" svg:height="10.559cm" svg:x="1.6cm" svg:y="3.743cm" presentation:class="outline" presentation:placeholder="true">
        <draw:text-box/>
      </draw:frame>
      <draw:frame presentation:style-name="Mpr7" draw:text-style-name="MP4" draw:layer="backgroundobjects" svg:width="7.455cm" svg:height="1.103cm" svg:x="1.6cm" svg:y="14.575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10.143cm" svg:height="1.103cm" svg:x="10.944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7.455cm" svg:height="1.103cm" svg:x="22.944cm" svg:y="14.57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7.542cm" svg:height="2.791cm" svg:x="3.085cm" svg:y="1.398cm" presentation:class="title" presentation:placeholder="true">
        <draw:text-box/>
      </draw:frame>
      <draw:frame presentation:style-name="lyt-frepa-outline1" draw:layer="backgroundobjects" svg:width="26.399cm" svg:height="8.828cm" svg:x="4cm" svg:y="4.505cm" presentation:class="outline" presentation:placeholder="true">
        <draw:text-box/>
      </draw:frame>
      <draw:frame presentation:style-name="Mpr10" draw:text-style-name="MP4" draw:layer="backgroundobjects" svg:width="7.455cm" svg:height="1.103cm" svg:x="3.085cm" svg:y="14.27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10.143cm" svg:height="1.103cm" svg:x="11.744cm" svg:y="14.2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7.455cm" svg:height="1.103cm" svg:x="23.286cm" svg:y="14.27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5">
      <draw:frame presentation:style-name="lyt-techpoly-title" draw:layer="backgroundobjects" svg:width="28.799cm" svg:height="2.672cm" svg:x="1.6cm" svg:y="0.636cm" presentation:class="title" presentation:placeholder="true">
        <draw:text-box/>
      </draw:frame>
      <draw:frame presentation:style-name="lyt-techpoly-outline1" draw:layer="backgroundobjects" svg:width="28.799cm" svg:height="10.559cm" svg:x="1.6cm" svg:y="3.743cm" presentation:class="outline" presentation:placeholder="true">
        <draw:text-box/>
      </draw:frame>
      <draw:frame presentation:style-name="Mpr13" draw:text-style-name="MP4" draw:layer="backgroundobjects" svg:width="7.455cm" svg:height="1.103cm" svg:x="1.6cm" svg:y="14.575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10.143cm" svg:height="1.103cm" svg:x="10.944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7.455cm" svg:height="1.103cm" svg:x="22.944cm" svg:y="14.57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7.429cm" svg:height="2.166cm" svg:x="2.285cm" svg:y="1.142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6.857cm" svg:height="8cm" svg:x="2.285cm" svg:y="4.19cm" presentation:class="outline" presentation:placeholder="true">
        <draw:text-box/>
      </draw:frame>
      <draw:frame presentation:style-name="Mpr17" draw:text-style-name="MP4" draw:layer="backgroundobjects" svg:width="7.455cm" svg:height="1.103cm" svg:x="2.145cm" svg:y="13.333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10.23cm" svg:height="1.103cm" svg:x="10.857cm" svg:y="13.37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7.455cm" svg:height="1.103cm" svg:x="22.259cm" svg:y="13.37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orest" style:page-layout-name="PM1" draw:style-name="Mdp7">
      <draw:frame presentation:style-name="lyt-forest-title" draw:layer="backgroundobjects" svg:width="28cm" svg:height="2.167cm" svg:x="1.714cm" svg:y="1.141cm" presentation:class="title" presentation:placeholder="true">
        <draw:text-box/>
      </draw:frame>
      <draw:frame presentation:style-name="lyt-forest-outline1" draw:layer="backgroundobjects" svg:width="28cm" svg:height="10.733cm" svg:x="1.714cm" svg:y="3.743cm" presentation:class="outline" presentation:placeholder="true">
        <draw:text-box/>
      </draw:frame>
      <draw:frame presentation:style-name="Mpr20" draw:text-style-name="MP4" draw:layer="backgroundobjects" svg:width="7.425cm" svg:height="1.099cm" svg:x="1.714cm" svg:y="14.806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10.102cm" svg:height="1.099cm" svg:x="11.021cm" svg:y="14.806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7.425cm" svg:height="1.099cm" svg:x="22.973cm" svg:y="14.806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orest-title" draw:layer="backgroundobjects" svg:width="14.848cm" svg:height="11.136cm" svg:x="3.075cm" svg:y="2.257cm" presentation:class="page"/>
        <draw:frame presentation:style-name="lyt-fores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chuan </meta:initial-creator>
    <meta:creation-date>2026-05-14T18:16:48.36</meta:creation-date>
    <meta:editing-duration>PT12H41M22S</meta:editing-duration>
    <meta:editing-cycles>54</meta:editing-cycles>
    <dc:date>2026-05-18T16:36:21.59</dc:date>
    <dc:creator>Yuchuan </dc:creator>
    <meta:generator>OpenOffice/4.1.15$Win32 OpenOffice.org_project/4115m2$Build-9813</meta:generator>
    <meta:document-statistic meta:object-count="15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19cm" svg:height="5.132cm" xlink:href="." xlink:type="simple" chart:class="chart:circle" chart:style-name="ch1">
        <chart:legend chart:legend-position="end" svg:x="6.506cm" svg:y="1.256cm" style:legend-expansion="high" chart:style-name="ch2"/>
        <chart:plot-area chart:style-name="ch3" chart:data-source-has-labels="both" svg:x="1.453cm" svg:y="0.236cm" svg:width="4.549cm" svg:height="4.514cm">
          <chartooo:coordinate-region svg:x="1.919cm" svg:y="0.729cm" svg:width="3.496cm" svg:height="3.63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 %</text:p>
              </table:table-cell>
            </table:table-row>
          </table:table-header-rows>
          <table:table-rows>
            <table:table-row>
              <table:table-cell office:value-type="string">
                <text:p>Industri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rivate Hausehal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Gewerbe, Handel, Dienstleistung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