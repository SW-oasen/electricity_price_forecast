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F80000023659B428A1.png"/>
  <manifest:file-entry manifest:media-type="image/png" manifest:full-path="Pictures/10000201000005F800000285016D291D.png"/>
  <manifest:file-entry manifest:media-type="image/png" manifest:full-path="Pictures/10000201000009300000041EEC6E72C0.png"/>
  <manifest:file-entry manifest:media-type="image/png" manifest:full-path="Pictures/10000000000003940000017B26665A71.png"/>
  <manifest:file-entry manifest:media-type="image/png" manifest:full-path="Pictures/100000000000023100000194252BC3F5.png"/>
  <manifest:file-entry manifest:media-type="image/png" manifest:full-path="Pictures/1000020100000276000001D533415BAE.png"/>
  <manifest:file-entry manifest:media-type="image/png" manifest:full-path="Pictures/1000020100000223000001476FC2C542.png"/>
  <manifest:file-entry manifest:media-type="image/png" manifest:full-path="Pictures/10000000000003920000017BEF8281C4.png"/>
  <manifest:file-entry manifest:media-type="image/png" manifest:full-path="Pictures/1000000000000366000000FAA2C41336.png"/>
  <manifest:file-entry manifest:media-type="image/png" manifest:full-path="Pictures/1000000000000467000002B2B40CF180.png"/>
  <manifest:file-entry manifest:media-type="image/png" manifest:full-path="Pictures/10000000000003990000017B66E128FB.png"/>
  <manifest:file-entry manifest:media-type="image/png" manifest:full-path="Pictures/10000000000002AE0000008EA529D7DD.png"/>
  <manifest:file-entry manifest:media-type="image/png" manifest:full-path="Pictures/10000201000002550000008EF97DABB2.png"/>
  <manifest:file-entry manifest:media-type="image/png" manifest:full-path="Pictures/10000000000003E0000001E9B186BA7C.png"/>
  <manifest:file-entry manifest:media-type="image/png" manifest:full-path="Pictures/100000000000056D00000122077B00B7.png"/>
  <manifest:file-entry manifest:media-type="image/png" manifest:full-path="Pictures/100002010000022300000147150249BA.png"/>
  <manifest:file-entry manifest:media-type="image/png" manifest:full-path="Pictures/100000000000023800000194CB6EB5DA.png"/>
  <manifest:file-entry manifest:media-type="image/png" manifest:full-path="Pictures/10000201000000E1000000E19FCF5E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6f8fb" presentation:display-footer="false" presentation:display-page-number="false" presentation:display-date-time="fals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svg:stroke-color="#f4c430" draw:fill="solid" draw:fill-color="#0084d1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f4c430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" style:family="graphic" style:parent-style-name="standard">
      <style:graphic-properties draw:stroke="solid" svg:stroke-width="0.035cm" svg:stroke-color="#e6ec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a8e8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a878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0" style:family="graphic" style:parent-style-name="standard">
      <style:graphic-properties draw:fill="gradient" draw:fill-gradient-name="Orange_20_Gradient_20_2" draw:textarea-vertical-align="middle" draw:auto-grow-height="false" fo:min-height="0.749cm" fo:min-width="0.499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35cm" svg:stroke-color="#ffffff" svg:stroke-opacity="0%" draw:fill="solid" draw:fill-color="#ff9900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ffff" svg:stroke-opacity="0%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fill="solid" draw:fill-color="#0070c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035cm" svg:stroke-color="#d8e0e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7" style:family="graphic" style:parent-style-name="standard">
      <style:graphic-properties draw:stroke="solid" svg:stroke-width="0.035cm" svg:stroke-color="#ffffff" svg:stroke-opacity="0%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ffffff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99ccf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2" style:family="graphic" style:parent-style-name="standard">
      <style:graphic-properties draw:stroke="solid" svg:stroke-width="0.176cm" svg:stroke-color="#0070c0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70c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70c0" svg:stroke-opacity="0%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00a878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e2e8f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70c0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76cm" svg:stroke-color="#339966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339966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6" style:family="graphic" style:parent-style-name="standard">
      <style:graphic-properties draw:stroke="solid" svg:stroke-width="0.05cm" svg:stroke-color="#3399ff" draw:marker-start-width="0.223cm" draw:marker-end-width="0.223cm" draw:fill="solid" draw:fill-color="#ffffff" draw:auto-grow-height="false" fo:min-height="0cm" fo:min-width="0cm" fo:padding-top="0.133cm" fo:padding-bottom="0.133cm" fo:padding-left="0.258cm" fo:padding-right="0.258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8" style:family="graphic" style:parent-style-name="standard">
      <style:graphic-properties draw:stroke="solid" svg:stroke-width="0.035cm" svg:stroke-color="#0b1f33" draw:fill="solid" draw:fill-color="#0b1f33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cm" svg:stroke-color="#eef8f3" draw:marker-start-width="0.223cm" draw:marker-end-width="0.223cm" draw:fill="solid" draw:fill-color="#eef8f3" draw:auto-grow-height="false" fo:min-height="0cm" fo:min-width="0cm" fo:padding-top="0.133cm" fo:padding-bottom="0.133cm" fo:padding-left="0.258cm" fo:padding-right="0.258cm" fo:wrap-option="wrap"/>
    </style:style>
    <style:style style:name="gr40" style:family="graphic" style:parent-style-name="standard">
      <style:graphic-properties draw:stroke="solid" svg:stroke-width="0.018cm" svg:stroke-color="#e6ecf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cm" svg:stroke-color="#e6ecf2" draw:marker-start-width="0.248cm" draw:marker-end-width="0.248cm" draw:fill="none" draw:textarea-horizontal-align="center" draw:textarea-vertical-align="middle" draw:auto-grow-height="false" fo:padding-top="0.141cm" fo:padding-bottom="0.141cm" fo:padding-left="0.266cm" fo:padding-right="0.266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4" style:family="graphic" style:parent-style-name="standard">
      <style:graphic-properties draw:stroke="solid" svg:stroke-width="0.05cm" svg:stroke-color="#3399ff" draw:marker-start-width="0.222cm" draw:marker-end-width="0.222cm" draw:fill="solid" draw:fill-color="#ffffff" draw:auto-grow-height="false" fo:min-height="0cm" fo:min-width="0cm" fo:padding-top="0.132cm" fo:padding-bottom="0.132cm" fo:padding-left="0.257cm" fo:padding-right="0.257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8" style:family="graphic" style:parent-style-name="standard">
      <style:graphic-properties draw:stroke="solid" svg:stroke-width="0.05cm" svg:stroke-color="#e6ecf2" draw:marker-start-width="0.223cm" draw:marker-end-width="0.223cm" draw:fill="solid" draw:fill-color="#ffffff" draw:auto-grow-height="false" fo:min-height="0cm" fo:min-width="0cm" fo:padding-top="0.133cm" fo:padding-bottom="0.133cm" fo:padding-left="0.258cm" fo:padding-right="0.258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3" style:family="graphic" style:parent-style-name="standard">
      <style:graphic-properties draw:stroke="solid" svg:stroke-width="0.035cm" svg:stroke-color="#83caf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5" style:family="graphic" style:parent-style-name="standard">
      <style:graphic-properties draw:stroke="solid" svg:stroke-width="0.035cm" svg:stroke-color="#ff950e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7" style:family="graphic" style:parent-style-name="standard">
      <style:graphic-properties draw:stroke="solid" svg:stroke-width="0.1cm" svg:stroke-color="#3399ff" draw:marker-start-width="0.298cm" draw:marker-end-width="0.298cm" svg:stroke-opacity="0%" draw:fill="gradient" draw:fill-color="#333333" draw:fill-gradient-name="Blue_20_Gradient_20_2" draw:auto-grow-height="false" fo:min-height="0cm" fo:min-width="0cm" fo:padding-top="0.158cm" fo:padding-bottom="0.158cm" fo:padding-left="0.283cm" fo:padding-right="0.283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32pt" fo:font-weight="bold" style:font-size-asian="32pt" style:font-weight-asian="bold" style:font-size-complex="32pt" style:font-weight-complex="bold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32pt" fo:font-weight="bold" style:font-size-asian="32pt" style:font-weight-asian="bold" style:font-size-complex="32pt" style:font-weight-complex="bold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8" style:family="paragraph">
      <style:paragraph-properties style:font-independent-line-spacing="true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2" style:family="paragraph">
      <style:paragraph-properties style:font-independent-line-spacing="true"/>
      <style:text-properties fo:color="#ffffff" fo:font-size="18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6" style:family="paragraph">
      <style:paragraph-properties style:font-independent-line-spacing="true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4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0pt" fo:font-weight="bold" style:font-size-asian="10pt" style:font-weight-asian="bold" style:font-size-complex="10pt" style:font-weight-complex="bold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P2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family="Arial" style:font-family-generic="swiss" style:font-pitch="variable" fo:font-size="12pt" style:font-size-asian="12pt" style:font-size-complex="12pt" fo:hyphenate="false"/>
    </style:style>
    <style:style style:name="P25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family="Arial" style:font-family-generic="swiss" style:font-pitch="variable" fo:font-size="12pt" style:font-size-asian="12pt" style:font-size-complex="12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2pt" style:font-size-asian="12pt" style:font-size-complex="12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2pt" style:font-size-asian="12pt" style:font-size-complex="12pt" fo:hyphenate="false"/>
    </style:style>
    <style:style style:name="P3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5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36" style:family="paragraph">
      <style:paragraph-properties style:font-independent-line-spacing="true"/>
      <style:text-properties fo:font-family="Arial" style:font-family-generic="swiss" style:font-pitch="variable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8" style:family="paragraph">
      <style:paragraph-properties style:font-independent-line-spacing="true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4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42" style:family="paragraph">
      <style:paragraph-properties style:font-independent-line-spacing="true"/>
      <style:text-properties fo:font-size="14pt" style:font-size-asian="14pt" style:font-size-complex="14pt"/>
    </style:style>
    <style:style style:name="P43" style:family="paragraph">
      <style:paragraph-properties style:font-independent-line-spacing="true"/>
      <style:text-properties fo:font-size="9pt" style:font-size-asian="9pt" style:font-size-complex="9pt"/>
    </style:style>
    <style:style style:name="P4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3pt" style:font-size-asian="13pt" style:font-size-complex="13pt" fo:hyphenate="false"/>
    </style:style>
    <style:style style:name="P4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family="Arial" style:font-family-generic="swiss" style:font-pitch="variable" fo:font-size="13pt" style:font-size-asian="13pt" style:font-size-complex="13pt" fo:hyphenate="false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3pt" style:font-size-asian="13pt" style:font-size-complex="13pt"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Arial" style:font-family-generic="swiss" style:font-pitch="variable" fo:font-size="13pt" style:font-size-asian="13pt" style:font-size-complex="13pt" fo:hyphenate="false"/>
    </style:style>
    <style:style style:name="P4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  <style:text-properties fo:font-family="Arial" style:font-family-generic="swiss" style:font-pitch="variable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family="Arial" style:font-family-generic="swiss" style:font-pitch="variable" fo:font-size="13pt" style:font-size-asian="13pt" style:font-size-complex="13pt" fo:hyphenate="false"/>
    </style:style>
    <style:style style:name="P5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Arial" style:font-family-generic="swiss" style:font-pitch="variable" fo:font-size="14pt" style:font-size-asian="14pt" style:font-size-complex="14pt" fo:hyphenate="false"/>
    </style:style>
    <style:style style:name="T1" style:family="text">
      <style:text-properties fo:color="#000000" style:text-line-through-style="none" fo:font-family="'Aptos Display'" style:font-family-generic="swiss" fo:font-size="32pt" fo:letter-spacing="normal" fo:font-style="normal" style:text-underline-style="none" fo:font-weight="bold" style:font-family-asian="'Aptos Display'" style:font-pitch-asian="fixed" style:font-size-asian="32pt" style:font-style-asian="normal" style:font-weight-asian="bold" style:font-family-complex="'Aptos Display'" style:font-family-generic-complex="swiss" style:font-size-complex="32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Aptos" style:font-pitch-asian="fixed" style:font-size-asian="18pt" style:font-style-asian="normal" style:font-weight-asian="normal" style:font-family-complex="Aptos" style:font-family-generic-complex="swiss" style:font-size-complex="18pt" style:font-style-complex="normal" style:font-weight-complex="normal"/>
    </style:style>
    <style:style style:name="T3" style:family="text">
      <style:text-properties fo:color="#000000" style:text-line-through-style="none" fo:font-family="Aptos" style:font-family-generic="swiss" fo:font-size="20pt" fo:letter-spacing="normal" fo:font-style="normal" style:text-underline-style="none" fo:font-weight="bold" style:font-family-asian="Aptos" style:font-pitch-asian="fixed" style:font-size-asian="20pt" style:font-style-asian="normal" style:font-weight-asian="bold" style:font-family-complex="Aptos" style:font-family-generic-complex="swiss" style:font-size-complex="20pt" style:font-style-complex="normal" style:font-weight-complex="bold"/>
    </style:style>
    <style:style style:name="T4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normal" style:font-family-asian="Aptos" style:font-pitch-asian="fixed" style:font-size-asian="10.5pt" style:font-style-asian="normal" style:font-weight-asian="normal" style:font-family-complex="Aptos" style:font-family-generic-complex="swiss" style:font-size-complex="10.5pt" style:font-style-complex="normal" style:font-weight-complex="normal"/>
    </style:style>
    <style:style style:name="T5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bold" style:font-family-asian="Aptos" style:font-pitch-asian="fixed" style:font-size-asian="9pt" style:font-style-asian="normal" style:font-weight-asian="bold" style:font-family-complex="Aptos" style:font-family-generic-complex="swiss" style:font-size-complex="9pt" style:font-style-complex="normal" style:font-weight-complex="bold"/>
    </style:style>
    <style:style style:name="T8" style:family="text">
      <style:text-properties fo:color="#000000" style:text-line-through-style="none" fo:font-family="'Aptos Display'" style:font-family-generic="swiss" fo:font-size="26pt" fo:letter-spacing="normal" fo:font-style="normal" style:text-underline-style="none" fo:font-weight="bold" style:font-family-asian="'Aptos Display'" style:font-pitch-asian="fixed" style:font-size-asian="26pt" style:font-style-asian="normal" style:font-weight-asian="bold" style:font-family-complex="'Aptos Display'" style:font-family-generic-complex="swiss" style:font-size-complex="26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style:style style:name="T10" style:family="text">
      <style:text-properties fo:color="#ffffff" style:text-line-through-style="none" fo:font-family="Aptos" style:font-family-generic="swiss" fo:font-size="13pt" fo:letter-spacing="normal" fo:font-style="normal" style:text-underline-style="none" fo:font-weight="bold" style:font-family-asian="Aptos" style:font-pitch-asian="fixed" style:font-size-asian="13pt" style:font-style-asian="normal" style:font-weight-asian="bold" style:font-family-complex="Aptos" style:font-family-generic-complex="swiss" style:font-size-complex="13pt" style:font-style-complex="normal" style:font-weight-complex="bold"/>
    </style:style>
    <style:style style:name="T11" style:family="text">
      <style:text-properties fo:color="#ffffff" style:text-line-through-style="none" fo:font-family="Aptos" style:font-family-generic="swiss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12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4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15" style:family="text">
      <style:text-properties fo:color="#000000" style:text-line-through-style="none" fo:font-family="Aptos" style:font-family-generic="swiss" fo:font-size="8.5pt" fo:letter-spacing="normal" fo:font-style="normal" style:text-underline-style="none" fo:font-weight="normal" style:font-family-asian="Aptos" style:font-pitch-asian="fixed" style:font-size-asian="8.5pt" style:font-style-asian="normal" style:font-weight-asian="normal" style:font-family-complex="Aptos" style:font-family-generic-complex="swiss" style:font-size-complex="8.5pt" style:font-style-complex="normal" style:font-weight-complex="normal"/>
    </style:style>
    <style:style style:name="T16" style:family="text">
      <style:text-properties fo:color="#000000" style:text-line-through-style="none" fo:font-family="Aptos" style:font-family-generic="swiss" fo:font-size="9.5pt" fo:letter-spacing="normal" fo:font-style="normal" style:text-underline-style="none" fo:font-weight="normal" style:font-family-asian="Aptos" style:font-pitch-asian="fixed" style:font-size-asian="9.5pt" style:font-style-asian="normal" style:font-weight-asian="normal" style:font-family-complex="Aptos" style:font-family-generic-complex="swiss" style:font-size-complex="9.5pt" style:font-style-complex="normal" style:font-weight-complex="normal"/>
    </style:style>
    <style:style style:name="T17" style:family="text">
      <style:text-properties fo:color="#000000" style:text-line-through-style="none" fo:font-family="Aptos" style:font-family-generic="swiss" fo:font-size="15pt" fo:letter-spacing="normal" fo:font-style="normal" style:text-underline-style="none" fo:font-weight="bold" style:font-family-asian="Aptos" style:font-pitch-asian="fixed" style:font-size-asian="15pt" style:font-style-asian="normal" style:font-weight-asian="bold" style:font-family-complex="Aptos" style:font-family-generic-complex="swiss" style:font-size-complex="15pt" style:font-style-complex="normal" style:font-weight-complex="bold"/>
    </style:style>
    <style:style style:name="T18" style:family="text">
      <style:text-properties fo:color="#000000" style:text-line-through-style="none" fo:font-family="Aptos" style:font-family-generic="swiss" fo:font-size="11.5pt" fo:letter-spacing="normal" fo:font-style="normal" style:text-underline-style="none" fo:font-weight="normal" style:font-family-asian="Aptos" style:font-pitch-asian="fixed" style:font-size-asian="11.5pt" style:font-style-asian="normal" style:font-weight-asian="normal" style:font-family-complex="Aptos" style:font-family-generic-complex="swiss" style:font-size-complex="11.5pt" style:font-style-complex="normal" style:font-weight-complex="normal"/>
    </style:style>
    <style:style style:name="T19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family-asian="Aptos" style:font-pitch-asian="fixed" style:font-size-asian="18pt" style:font-style-asian="normal" style:font-weight-asian="bold" style:font-family-complex="Aptos" style:font-family-generic-complex="swiss" style:font-size-complex="18pt" style:font-style-complex="normal" style:font-weight-complex="bold"/>
    </style:style>
    <style:style style:name="T20" style:family="text">
      <style:text-properties fo:color="#000000" style:text-line-through-style="none" fo:font-family="Arial" style:font-family-generic="swiss" style:font-pitch="variable" fo:font-size="13.5pt" fo:letter-spacing="normal" fo:font-style="normal" style:text-underline-style="none" fo:font-weight="normal" style:font-family-asian="Aptos" style:font-pitch-asian="fixed" style:font-size-asian="13.5pt" style:font-style-asian="normal" style:font-weight-asian="normal" style:font-family-complex="Aptos" style:font-family-generic-complex="swiss" style:font-size-complex="13.5pt" style:font-style-complex="normal" style:font-weight-complex="normal"/>
    </style:style>
    <style:style style:name="T21" style:family="text">
      <style:text-properties fo:color="#000000" style:text-line-through-style="none" fo:font-family="Arial" style:font-family-generic="swiss" style:font-pitch="variable" fo:font-size="13.5pt" fo:letter-spacing="normal" fo:font-style="normal" style:text-underline-style="none" fo:font-weight="bold" style:font-family-asian="Aptos" style:font-pitch-asian="fixed" style:font-size-asian="13.5pt" style:font-style-asian="normal" style:font-weight-asian="bold" style:font-family-complex="Aptos" style:font-family-generic-complex="swiss" style:font-size-complex="13.5pt" style:font-style-complex="normal" style:font-weight-complex="bold"/>
    </style:style>
    <style:style style:name="T22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23" style:family="text">
      <style:text-properties fo:color="#000000" style:text-line-through-style="none" fo:font-family="Aptos" style:font-family-generic="swiss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24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normal" style:font-family-asian="Aptos" style:font-pitch-asian="fixed" style:font-size-asian="9pt" style:font-style-asian="normal" style:font-weight-asian="normal" style:font-family-complex="Aptos" style:font-family-generic-complex="swiss" style:font-size-complex="9pt" style:font-style-complex="normal" style:font-weight-complex="normal"/>
    </style:style>
    <style:style style:name="T25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bold" style:font-family-asian="Aptos" style:font-pitch-asian="fixed" style:font-size-asian="13pt" style:font-style-asian="normal" style:font-weight-asian="bold" style:font-family-complex="Aptos" style:font-family-generic-complex="swiss" style:font-size-complex="13pt" style:font-style-complex="normal" style:font-weight-complex="bold"/>
    </style:style>
    <style:style style:name="T26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normal" style:font-family-asian="Aptos" style:font-pitch-asian="fixed" style:font-size-asian="13pt" style:font-style-asian="normal" style:font-weight-asian="normal" style:font-family-complex="Aptos" style:font-family-generic-complex="swiss" style:font-size-complex="13pt" style:font-style-complex="normal" style:font-weight-complex="normal"/>
    </style:style>
    <style:style style:name="T27" style:family="text">
      <style:text-properties fo:color="#ffffff" style:text-line-through-style="none" fo:font-family="Arial" style:font-family-generic="swiss" style:font-pitch="variable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28" style:family="text">
      <style:text-properties fo:color="#ffffff" style:text-line-through-style="none" fo:font-family="Arial" style:font-family-generic="swiss" style:font-pitch="variable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22cm"/>
        <style:text-properties fo:font-family="StarSymbol" fo:color="#152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5223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7e6f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f3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9.9cm" svg:y="3.873cm">
          <draw:image xlink:href="Pictures/10000201000000E1000000E19FCF5E2D.png" xlink:type="simple" xlink:show="embed" xlink:actuate="onLoad">
            <text:p/>
          </draw:image>
        </draw:frame>
        <draw:custom-shape draw:name="Shape 0" draw:style-name="gr2" draw:text-style-name="P2" draw:layer="layout" svg:width="32.908cm" svg:height="1.486cm" svg:x="0.958cm" svg:y="17.563cm">
          <text:p/>
          <draw:enhanced-geometry svg:viewBox="0 0 21600 21600" draw:type="rectangle" draw:enhanced-path="M 0 0 L 21600 0 21600 21600 0 21600 0 0 Z N"/>
        </draw:custom-shape>
        <draw:custom-shape draw:name="Shape 0" draw:style-name="gr3" draw:text-style-name="P2" draw:layer="layout" svg:width="0.958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Text 2" draw:style-name="gr4" draw:text-style-name="P4" draw:layer="layout" svg:width="17.142cm" svg:height="4.19cm" svg:x="3.683cm" svg:y="3.683cm">
          <text:p text:style-name="P3"><text:span text:style-name="T1">Stromverbrauch-Vorhersage </text:span></text:p>
          <text:p text:style-name="P3"><text:span text:style-name="T1">Deutschland</text:span></text:p>
          <draw:enhanced-geometry svg:viewBox="0 0 21600 21600" draw:type="rectangle" draw:enhanced-path="M 0 0 L 21600 0 21600 21600 0 21600 0 0 Z N"/>
        </draw:custom-shape>
        <draw:custom-shape draw:name="Text 3" draw:style-name="gr5" draw:text-style-name="P6" draw:layer="layout" svg:width="26.554cm" svg:height="0.964cm" svg:x="3.759cm" svg:y="8.255cm">
          <text:p text:style-name="P5"><text:span text:style-name="T2">Machine Learning für stündliche Netzlast-Prognosen · Wetter · Kalender · SMARD-Vergleich</text:span></text:p>
          <draw:enhanced-geometry svg:viewBox="0 0 21600 21600" draw:type="rectangle" draw:enhanced-path="M 0 0 L 21600 0 21600 21600 0 21600 0 0 Z N"/>
        </draw:custom-shape>
        <draw:custom-shape draw:name="Shape 4" draw:style-name="gr6" draw:text-style-name="P2" draw:layer="layout" svg:width="6.73cm" svg:height="2.666cm" svg:x="3.68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7" draw:text-style-name="P2" draw:layer="layout" svg:width="0.202cm" svg:height="2.666cm" svg:x="3.683cm" svg:y="10.795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8" draw:layer="layout" svg:width="5.841cm" svg:height="0.863cm" svg:x="4.318cm" svg:y="11.252cm">
          <text:p text:style-name="P7"><text:span text:style-name="T3">2019–24 / 2025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10" draw:layer="layout" svg:width="5.841cm" svg:height="0.71cm" svg:x="4.318cm" svg:y="12.268cm">
          <text:p text:style-name="P9"><text:span text:style-name="T4">Train/Test Split</text:span></text:p>
          <draw:enhanced-geometry svg:viewBox="0 0 21600 21600" draw:type="rectangle" draw:enhanced-path="M 0 0 L 21600 0 21600 21600 0 21600 0 0 Z N"/>
        </draw:custom-shape>
        <draw:custom-shape draw:name="Shape 8" draw:style-name="gr6" draw:text-style-name="P2" draw:layer="layout" svg:width="5.46cm" svg:height="2.666cm" svg:x="11.049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3" draw:text-style-name="P2" draw:layer="layout" svg:width="0.202cm" svg:height="2.666cm" svg:x="11.049cm" svg:y="10.795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8" draw:layer="layout" svg:width="4.571cm" svg:height="0.863cm" svg:x="11.684cm" svg:y="11.252cm">
          <text:p text:style-name="P7"><text:span text:style-name="T3">SMARD API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10" draw:layer="layout" svg:width="4.571cm" svg:height="0.71cm" svg:x="11.684cm" svg:y="12.268cm">
          <text:p text:style-name="P9"><text:span text:style-name="T4">Aktualisierung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2" draw:layer="layout" svg:width="6.462cm" svg:height="2.666cm" svg:x="17.14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2" draw:layer="layout" svg:width="0.202cm" svg:height="2.666cm" svg:x="17.145cm" svg:y="10.795cm">
          <text:p/>
          <draw:enhanced-geometry svg:viewBox="0 0 21600 21600" draw:type="rectangle" draw:enhanced-path="M 0 0 L 21600 0 21600 21600 0 21600 0 0 Z N"/>
        </draw:custom-shape>
        <draw:custom-shape draw:name="Text 14" draw:style-name="gr9" draw:text-style-name="P11" draw:layer="layout" svg:width="6.922cm" svg:height="0.863cm" svg:x="17.78cm" svg:y="11.252cm">
          <text:p text:style-name="P7"><text:span text:style-name="T3">Streamlit App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10" draw:layer="layout" svg:width="5.079cm" svg:height="0.71cm" svg:x="17.78cm" svg:y="12.268cm">
          <text:p text:style-name="P9"><text:span text:style-name="T4">Output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12" draw:layer="layout" svg:width="10.667cm" svg:height="0.761cm" svg:x="3.759cm" svg:y="17.967cm">
          <text:p text:style-name="P9"><text:span text:style-name="T5">Yuchuan Liu · Mai 2026 · Portfolio-Projek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48cm" svg:height="2.383cm" svg:x="21.765cm" svg:y="3.43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2" draw:style-name="dp3" draw:master-page-name="Standard">
        <office:forms form:automatic-focus="false" form:apply-design-mode="false"/>
        <draw:custom-shape draw:name="Shape 14" draw:style-name="gr12" draw:text-style-name="P2" draw:layer="layout" svg:width="5cm" svg:height="4cm" svg:x="20.925cm" svg:y="5.34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Shape 14" draw:style-name="gr13" draw:text-style-name="P2" draw:layer="layout" svg:width="5cm" svg:height="4cm" svg:x="16.327cm" svg:y="5.34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5cm" svg:height="4cm" svg:x="2.532cm" svg:y="5.29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STORYLINE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6" draw:layer="layout" svg:width="23.494cm" svg:height="1.421cm" svg:x="1.524cm" svg:y="1.067cm">
          <text:p text:style-name="P9"><text:span text:style-name="T8">Projektziel: belastbare 24h-Lastprognose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Text 4" draw:style-name="gr16" draw:text-style-name="P19" draw:layer="layout" svg:width="30.386cm" svg:height="1.396cm" svg:x="1.524cm" svg:y="3.099cm">
          <text:p text:style-name="P18"><text:span text:style-name="T9">Ziel ist nicht nur ein hoher R²-Wert, sondern eine Prognose, die im Tagesbetrieb interpretierbar und mit offiziellen SMARD-Werten vergleichbar ist.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21" draw:layer="layout" svg:width="3.936cm" svg:height="2.481cm" svg:x="2.887cm" svg:y="6.071cm">
          <text:p text:style-name="P20"><text:span text:style-name="T10">1 <text:s/>Datenbasis</text:span></text:p>
          <text:p text:style-name="P20"><text:span text:style-name="T10"/></text:p>
          <text:p text:style-name="P20"><text:span text:style-name="T11"><text:s text:c="2"/></text:span><text:span text:style-name="T11">Kaggle</text:span></text:p>
          <text:p text:style-name="P20"><text:span text:style-name="T11"><text:s text:c="2"/></text:span><text:span text:style-name="T11">Open-Meteo</text:span></text:p>
          <text:p text:style-name="P20"><text:span text:style-name="T11"><text:s text:c="2"/></text:span><text:span text:style-name="T11">SMARD</text:span></text:p>
          <draw:enhanced-geometry svg:viewBox="0 0 21600 21600" draw:type="rectangle" draw:enhanced-path="M 0 0 L 21600 0 21600 21600 0 21600 0 0 Z N"/>
        </draw:custom-shape>
        <draw:custom-shape draw:name="Shape 8" draw:style-name="gr17" draw:text-style-name="P2" draw:layer="layout" svg:width="5cm" svg:height="4cm" svg:x="7.13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9" draw:style-name="gr4" draw:text-style-name="P23" draw:layer="layout" svg:width="2.861cm" svg:height="2.414cm" svg:x="8.444cm" svg:y="6.104cm">
          <text:p text:style-name="P22"><text:span text:style-name="T10">2 <text:s/>Features</text:span></text:p>
          <text:p text:style-name="P22"><text:span text:style-name="T12"><text:s text:c="2"/></text:span></text:p>
          <text:p text:style-name="P22"><text:span text:style-name="T11"><text:s text:c="2"/></text:span><text:span text:style-name="T11">Lag- und </text:span></text:p>
          <text:p text:style-name="P22"><text:span text:style-name="T11"><text:s text:c="2"/></text:span><text:span text:style-name="T11">Rolling-</text:span></text:p>
          <text:p text:style-name="P22"><text:span text:style-name="T11"><text:s text:c="2"/></text:span><text:span text:style-name="T11">Features</text:span></text:p>
          <draw:enhanced-geometry svg:viewBox="0 0 21600 21600" draw:type="rectangle" draw:enhanced-path="M 0 0 L 21600 0 21600 21600 0 21600 0 0 Z N"/>
        </draw:custom-shape>
        <draw:custom-shape draw:name="Shape 11" draw:style-name="gr18" draw:text-style-name="P2" draw:layer="layout" svg:width="5cm" svg:height="4cm" svg:x="11.729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2" draw:style-name="gr4" draw:text-style-name="P23" draw:layer="layout" svg:width="3.097cm" svg:height="2.368cm" draw:transform="skewX (-0.0324631240870884) translate (17.602cm 5.881cm)">
          <text:p text:style-name="P9"><text:span text:style-name="T10">4 <text:s/>Modelle</text:span></text:p>
          <text:p text:style-name="P9"><text:span text:style-name="T12"/></text:p>
          <text:p text:style-name="P9"><text:span text:style-name="T11"><text:s text:c="2"/></text:span><text:span text:style-name="T11">XGBoost</text:span></text:p>
          <text:p text:style-name="P9"><text:span text:style-name="T11"><text:s text:c="2"/></text:span><text:span text:style-name="T11">LightGBM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23" draw:layer="layout" svg:width="3.106cm" svg:height="2.459cm" svg:x="22.283cm" svg:y="6.082cm">
          <text:p text:style-name="P22"><text:span text:style-name="T10">5 <text:s/>Nutzung</text:span></text:p>
          <text:p text:style-name="P22"><text:span text:style-name="T12"/></text:p>
          <text:p text:style-name="P22"><text:span text:style-name="T11"><text:s text:c="2"/></text:span><text:span text:style-name="T11">Streamlit</text:span></text:p>
          <text:p text:style-name="P22"><text:span text:style-name="T11"><text:s text:c="2"/></text:span><text:span text:style-name="T11">Interactive</text:span></text:p>
          <text:p text:style-name="P22"><text:span text:style-name="T11"><text:s text:c="2"/></text:span><text:span text:style-name="T11">Notebook</text:span></text:p>
          <draw:enhanced-geometry svg:viewBox="0 0 21600 21600" draw:type="rectangle" draw:enhanced-path="M 0 0 L 21600 0 21600 21600 0 21600 0 0 Z N"/>
        </draw:custom-shape>
        <draw:custom-shape draw:name="Shape 17" draw:style-name="gr19" draw:text-style-name="P2" draw:layer="layout" svg:width="29.463cm" svg:height="6.546cm" svg:x="2.184cm" svg:y="10.0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9" draw:style-name="gr20" draw:text-style-name="P25" draw:layer="layout" svg:width="26.669cm" svg:height="4.653cm" svg:x="2.794cm" svg:y="10.822cm">
          <text:p text:style-name="P24"><text:span text:style-name="T13">Rekursive ML Ablauf</text:span></text:p>
          <text:list text:style-name="L3">
            <text:list-item>
              <text:p text:style-name="P24"><text:span text:style-name="T14">Von Problem → Daten → Features → Modell → Anwendung </text:span></text:p>
            </text:list-item>
            <text:list-item>
              <text:p text:style-name="P24"><text:span text:style-name="T14">Feature Engineering trägt mehr zu der Vorhersage bei als die Modellselektion und -tuning</text:span></text:p>
            </text:list-item>
            <text:list-item>
              <text:p text:style-name="P24"><text:span text:style-name="T14">Feature Selektion nach Feature Importance Analysis </text:span></text:p>
            </text:list-item>
            <text:list-item>
              <text:p text:style-name="P24"><text:span text:style-name="T14">Parameter Tuning und Interaktive GUI <text:s/>→ Überarbeitung der Funktionalität</text:span></text:p>
            </text:list-item>
            <text:list-item>
              <text:p text:style-name="P24"><text:span text:style-name="T14">Verschiedenen Zeitformate verursacht Synchronisationsprobleme</text:span></text:p>
            </text:list-item>
            <text:list-item>
              <text:p text:style-name="P24"><text:span text:style-name="T14">ETL Pipeline verbessert Reaktionszeit, Datensicherheit und -konsistenz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20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10" draw:layer="layout" svg:width="1.269cm" svg:height="0.558cm" svg:x="31.115cm" svg:y="18.136cm">
          <text:p text:style-name="P15"><text:span text:style-name="T15">2</text:span></text:p>
          <draw:enhanced-geometry svg:viewBox="0 0 21600 21600" draw:type="rectangle" draw:enhanced-path="M 0 0 L 21600 0 21600 21600 0 21600 0 0 Z N"/>
        </draw:custom-shape>
        <draw:custom-shape draw:name="Text 9" draw:style-name="gr4" draw:text-style-name="P23" draw:layer="layout" svg:width="2.674cm" svg:height="2.414cm" svg:x="13.138cm" svg:y="5.904cm">
          <text:p text:style-name="P22"><text:span text:style-name="T10">3 <text:s/>ETL</text:span></text:p>
          <text:p text:style-name="P22"><text:span text:style-name="T12"/></text:p>
          <text:p text:style-name="P22"><text:span text:style-name="T11"><text:s text:c="2"/></text:span><text:span text:style-name="T11">Datenbank <text:s text:c="5"/>Pipe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3" draw:style-name="dp3" draw:master-page-name="Standard">
        <office:forms form:automatic-focus="false" form:apply-design-mode="false"/>
        <draw:custom-shape draw:name="Shape 6" draw:style-name="gr19" draw:text-style-name="P2" draw:layer="layout" svg:width="29.336cm" svg:height="1.848cm" svg:x="2.159cm" svg:y="14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DATEN</text:span></text:p>
          <draw:enhanced-geometry svg:viewBox="0 0 21600 21600" draw:type="rectangle" draw:enhanced-path="M 0 0 L 21600 0 21600 21600 0 21600 0 0 Z N"/>
        </draw:custom-shape>
        <draw:custom-shape draw:name="Text 2" draw:style-name="gr21" draw:text-style-name="P26" draw:layer="layout" svg:width="28.744cm" svg:height="1.421cm" svg:x="1.524cm" svg:y="1.067cm">
          <text:p text:style-name="P9"><text:span text:style-name="T8">Datenbasis: historische Last + Wetter + Kalender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Text 4" draw:style-name="gr4" draw:text-style-name="P19" draw:layer="layout" svg:width="30.477cm" svg:height="1.066cm" svg:x="1.524cm" svg:y="2.999cm">
          <text:p text:style-name="P18"><text:span text:style-name="T9">Die Prognose kombiniert langfristige Verbrauchsmuster mit kurzfristigen Wetter- und Kalendereffekten.</text:span></text:p>
          <draw:enhanced-geometry svg:viewBox="0 0 21600 21600" draw:type="rectangle" draw:enhanced-path="M 0 0 L 21600 0 21600 21600 0 21600 0 0 Z N"/>
        </draw:custom-shape>
        <draw:line draw:name="Shape 5" draw:style-name="gr22" draw:text-style-name="P17" draw:layer="layout" svg:x1="2.159cm" svg:y1="6.223cm" svg:x2="21.971cm" svg:y2="6.223cm">
          <text:p/>
        </draw:line>
        <draw:custom-shape draw:name="Shape 6" draw:style-name="gr23" draw:text-style-name="P2" draw:layer="layout" svg:width="0.304cm" svg:height="0.304cm" svg:x="2.00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7" draw:style-name="gr4" draw:text-style-name="P10" draw:layer="layout" svg:width="1.117cm" svg:height="0.558cm" svg:x="1.6cm" svg:y="6.731cm">
          <text:p text:style-name="P27"><text:span text:style-name="T16">2019</text:span></text:p>
          <draw:enhanced-geometry svg:viewBox="0 0 21600 21600" draw:type="rectangle" draw:enhanced-path="M 0 0 L 21600 0 21600 21600 0 21600 0 0 Z N"/>
        </draw:custom-shape>
        <draw:custom-shape draw:name="Shape 8" draw:style-name="gr23" draw:text-style-name="P2" draw:layer="layout" svg:width="0.304cm" svg:height="0.304cm" svg:x="5.30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9" draw:style-name="gr4" draw:text-style-name="P10" draw:layer="layout" svg:width="1.117cm" svg:height="0.558cm" svg:x="4.902cm" svg:y="6.731cm">
          <text:p text:style-name="P27"><text:span text:style-name="T16">2020</text:span></text:p>
          <draw:enhanced-geometry svg:viewBox="0 0 21600 21600" draw:type="rectangle" draw:enhanced-path="M 0 0 L 21600 0 21600 21600 0 21600 0 0 Z N"/>
        </draw:custom-shape>
        <draw:custom-shape draw:name="Shape 10" draw:style-name="gr23" draw:text-style-name="P2" draw:layer="layout" svg:width="0.304cm" svg:height="0.304cm" svg:x="8.611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1" draw:style-name="gr4" draw:text-style-name="P10" draw:layer="layout" svg:width="1.117cm" svg:height="0.558cm" svg:x="8.204cm" svg:y="6.731cm">
          <text:p text:style-name="P27"><text:span text:style-name="T16">2021</text:span></text:p>
          <draw:enhanced-geometry svg:viewBox="0 0 21600 21600" draw:type="rectangle" draw:enhanced-path="M 0 0 L 21600 0 21600 21600 0 21600 0 0 Z N"/>
        </draw:custom-shape>
        <draw:custom-shape draw:name="Shape 12" draw:style-name="gr23" draw:text-style-name="P2" draw:layer="layout" svg:width="0.304cm" svg:height="0.304cm" svg:x="11.913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3" draw:style-name="gr4" draw:text-style-name="P10" draw:layer="layout" svg:width="1.117cm" svg:height="0.558cm" svg:x="11.506cm" svg:y="6.731cm">
          <text:p text:style-name="P27"><text:span text:style-name="T16">2022</text:span></text:p>
          <draw:enhanced-geometry svg:viewBox="0 0 21600 21600" draw:type="rectangle" draw:enhanced-path="M 0 0 L 21600 0 21600 21600 0 21600 0 0 Z N"/>
        </draw:custom-shape>
        <draw:custom-shape draw:name="Shape 14" draw:style-name="gr23" draw:text-style-name="P2" draw:layer="layout" svg:width="0.304cm" svg:height="0.304cm" svg:x="15.215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5" draw:style-name="gr4" draw:text-style-name="P10" draw:layer="layout" svg:width="1.117cm" svg:height="0.558cm" svg:x="14.808cm" svg:y="6.731cm">
          <text:p text:style-name="P27"><text:span text:style-name="T16">2023</text:span></text:p>
          <draw:enhanced-geometry svg:viewBox="0 0 21600 21600" draw:type="rectangle" draw:enhanced-path="M 0 0 L 21600 0 21600 21600 0 21600 0 0 Z N"/>
        </draw:custom-shape>
        <draw:custom-shape draw:name="Shape 16" draw:style-name="gr23" draw:text-style-name="P2" draw:layer="layout" svg:width="0.304cm" svg:height="0.304cm" svg:x="18.51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7" draw:style-name="gr4" draw:text-style-name="P10" draw:layer="layout" svg:width="1.117cm" svg:height="0.558cm" svg:x="18.11cm" svg:y="6.731cm">
          <text:p text:style-name="P27"><text:span text:style-name="T16">2024</text:span></text:p>
          <draw:enhanced-geometry svg:viewBox="0 0 21600 21600" draw:type="rectangle" draw:enhanced-path="M 0 0 L 21600 0 21600 21600 0 21600 0 0 Z N"/>
        </draw:custom-shape>
        <draw:custom-shape draw:name="Shape 18" draw:style-name="gr23" draw:text-style-name="P2" draw:layer="layout" svg:width="0.304cm" svg:height="0.304cm" svg:x="21.8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4" draw:text-style-name="P10" draw:layer="layout" svg:width="1.117cm" svg:height="0.558cm" svg:x="21.412cm" svg:y="6.731cm">
          <text:p text:style-name="P27"><text:span text:style-name="T16">2025</text:span></text:p>
          <draw:enhanced-geometry svg:viewBox="0 0 21600 21600" draw:type="rectangle" draw:enhanced-path="M 0 0 L 21600 0 21600 21600 0 21600 0 0 Z N"/>
        </draw:custom-shape>
        <draw:custom-shape draw:name="Shape 20" draw:style-name="gr24" draw:text-style-name="P2" draw:layer="layout" svg:width="5.841cm" svg:height="0.913cm" svg:x="15.459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1" draw:style-name="gr4" draw:text-style-name="P12" draw:layer="layout" svg:width="5.435cm" svg:height="0.659cm" svg:x="15.662cm" svg:y="4.978cm">
          <text:p text:style-name="P28"><text:span text:style-name="T12">Training: 2019–2024</text:span></text:p>
          <draw:enhanced-geometry svg:viewBox="0 0 21600 21600" draw:type="rectangle" draw:enhanced-path="M 0 0 L 21600 0 21600 21600 0 21600 0 0 Z N"/>
        </draw:custom-shape>
        <draw:custom-shape draw:name="Shape 22" draw:style-name="gr25" draw:text-style-name="P2" draw:layer="layout" svg:width="6.095cm" svg:height="0.913cm" svg:x="22.221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3" draw:style-name="gr4" draw:text-style-name="P12" draw:layer="layout" svg:width="5.689cm" svg:height="0.659cm" svg:x="22.324cm" svg:y="4.978cm">
          <text:p text:style-name="P28"><text:span text:style-name="T12">Finale Evaluation: 2025</text:span></text:p>
          <draw:enhanced-geometry svg:viewBox="0 0 21600 21600" draw:type="rectangle" draw:enhanced-path="M 0 0 L 21600 0 21600 21600 0 21600 0 0 Z N"/>
        </draw:custom-shape>
        <draw:custom-shape draw:name="Shape 24" draw:style-name="gr26" draw:text-style-name="P2" draw:layer="layout" svg:width="6.73cm" svg:height="3.682cm" svg:x="2.159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27" draw:text-style-name="P2" draw:layer="layout" svg:width="6.73cm" svg:height="0.304cm" svg:x="2.159cm" svg:y="8.509cm">
          <text:p/>
          <draw:enhanced-geometry svg:viewBox="0 0 21600 21600" draw:type="rectangle" draw:enhanced-path="M 0 0 L 21600 0 21600 21600 0 21600 0 0 Z N"/>
        </draw:custom-shape>
        <draw:custom-shape draw:name="Text 26" draw:style-name="gr4" draw:text-style-name="P10" draw:layer="layout" svg:width="5.714cm" svg:height="0.71cm" svg:x="2.616cm" svg:y="9.144cm">
          <text:p text:style-name="P9"><text:span text:style-name="T17">Kaggle</text:span></text:p>
          <draw:enhanced-geometry svg:viewBox="0 0 21600 21600" draw:type="rectangle" draw:enhanced-path="M 0 0 L 21600 0 21600 21600 0 21600 0 0 Z N"/>
        </draw:custom-shape>
        <draw:custom-shape draw:name="Text 27" draw:style-name="gr4" draw:text-style-name="P10" draw:layer="layout" svg:width="5.587cm" svg:height="1.396cm" svg:x="2.616cm" svg:y="10.211cm">
          <text:p text:style-name="P9"><text:span text:style-name="T18">Stündliche Lastdaten</text:span></text:p>
          <text:p text:style-name="P9"><text:span text:style-name="T18">CountryCode = DE</text:span></text:p>
          <draw:enhanced-geometry svg:viewBox="0 0 21600 21600" draw:type="rectangle" draw:enhanced-path="M 0 0 L 21600 0 21600 21600 0 21600 0 0 Z N"/>
        </draw:custom-shape>
        <draw:custom-shape draw:name="Shape 28" draw:style-name="gr26" draw:text-style-name="P2" draw:layer="layout" svg:width="6.73cm" svg:height="3.682cm" svg:x="9.906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7" draw:text-style-name="P2" draw:layer="layout" svg:width="6.73cm" svg:height="0.304cm" svg:x="9.906cm" svg:y="8.509cm">
          <text:p/>
          <draw:enhanced-geometry svg:viewBox="0 0 21600 21600" draw:type="rectangle" draw:enhanced-path="M 0 0 L 21600 0 21600 21600 0 21600 0 0 Z N"/>
        </draw:custom-shape>
        <draw:custom-shape draw:name="Text 30" draw:style-name="gr4" draw:text-style-name="P10" draw:layer="layout" svg:width="5.714cm" svg:height="0.71cm" svg:x="10.363cm" svg:y="9.144cm">
          <text:p text:style-name="P9"><text:span text:style-name="T17">Open-Meteo</text:span></text:p>
          <draw:enhanced-geometry svg:viewBox="0 0 21600 21600" draw:type="rectangle" draw:enhanced-path="M 0 0 L 21600 0 21600 21600 0 21600 0 0 Z N"/>
        </draw:custom-shape>
        <draw:custom-shape draw:name="Text 31" draw:style-name="gr4" draw:text-style-name="P10" draw:layer="layout" svg:width="5.587cm" svg:height="1.396cm" svg:x="10.363cm" svg:y="10.211cm">
          <text:p text:style-name="P9"><text:span text:style-name="T18">Historisches Wetter</text:span></text:p>
          <text:p text:style-name="P9"><text:span text:style-name="T18">Top-5-Städte nach Population gewichtet</text:span></text:p>
          <draw:enhanced-geometry svg:viewBox="0 0 21600 21600" draw:type="rectangle" draw:enhanced-path="M 0 0 L 21600 0 21600 21600 0 21600 0 0 Z N"/>
        </draw:custom-shape>
        <draw:custom-shape draw:name="Shape 32" draw:style-name="gr26" draw:text-style-name="P2" draw:layer="layout" svg:width="6.73cm" svg:height="3.682cm" svg:x="17.653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3" draw:style-name="gr8" draw:text-style-name="P2" draw:layer="layout" svg:width="6.73cm" svg:height="0.304cm" svg:x="17.653cm" svg:y="8.509cm">
          <text:p/>
          <draw:enhanced-geometry svg:viewBox="0 0 21600 21600" draw:type="rectangle" draw:enhanced-path="M 0 0 L 21600 0 21600 21600 0 21600 0 0 Z N"/>
        </draw:custom-shape>
        <draw:custom-shape draw:name="Text 34" draw:style-name="gr4" draw:text-style-name="P10" draw:layer="layout" svg:width="5.714cm" svg:height="0.71cm" svg:x="18.11cm" svg:y="9.144cm">
          <text:p text:style-name="P9"><text:span text:style-name="T17">python-holidays</text:span></text:p>
          <draw:enhanced-geometry svg:viewBox="0 0 21600 21600" draw:type="rectangle" draw:enhanced-path="M 0 0 L 21600 0 21600 21600 0 21600 0 0 Z N"/>
        </draw:custom-shape>
        <draw:custom-shape draw:name="Text 35" draw:style-name="gr4" draw:text-style-name="P10" draw:layer="layout" svg:width="5.587cm" svg:height="1.396cm" svg:x="18.11cm" svg:y="10.211cm">
          <text:p text:style-name="P9"><text:span text:style-name="T18">Feiertage, Brückentage,</text:span></text:p>
          <text:p text:style-name="P9"><text:span text:style-name="T18">Bundesland-Anteil</text:span></text:p>
          <draw:enhanced-geometry svg:viewBox="0 0 21600 21600" draw:type="rectangle" draw:enhanced-path="M 0 0 L 21600 0 21600 21600 0 21600 0 0 Z N"/>
        </draw:custom-shape>
        <draw:custom-shape draw:name="Shape 36" draw:style-name="gr26" draw:text-style-name="P2" draw:layer="layout" svg:width="6.73cm" svg:height="3.682cm" svg:x="25.4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7" draw:style-name="gr3" draw:text-style-name="P2" draw:layer="layout" svg:width="6.73cm" svg:height="0.304cm" svg:x="25.4cm" svg:y="8.509cm">
          <text:p/>
          <draw:enhanced-geometry svg:viewBox="0 0 21600 21600" draw:type="rectangle" draw:enhanced-path="M 0 0 L 21600 0 21600 21600 0 21600 0 0 Z N"/>
        </draw:custom-shape>
        <draw:custom-shape draw:name="Text 38" draw:style-name="gr4" draw:text-style-name="P10" draw:layer="layout" svg:width="5.714cm" svg:height="0.71cm" svg:x="25.857cm" svg:y="9.144cm">
          <text:p text:style-name="P9"><text:span text:style-name="T17">SMARD API</text:span></text:p>
          <draw:enhanced-geometry svg:viewBox="0 0 21600 21600" draw:type="rectangle" draw:enhanced-path="M 0 0 L 21600 0 21600 21600 0 21600 0 0 Z N"/>
        </draw:custom-shape>
        <draw:custom-shape draw:name="Text 39" draw:style-name="gr4" draw:text-style-name="P10" draw:layer="layout" svg:width="5.587cm" svg:height="1.396cm" svg:x="25.857cm" svg:y="10.211cm">
          <text:p text:style-name="P9"><text:span text:style-name="T18">Aktuelle Netzlast +</text:span></text:p>
          <text:p text:style-name="P9"><text:span text:style-name="T18">offizielle Prognose</text:span></text:p>
          <draw:enhanced-geometry svg:viewBox="0 0 21600 21600" draw:type="rectangle" draw:enhanced-path="M 0 0 L 21600 0 21600 21600 0 21600 0 0 Z N"/>
        </draw:custom-shape>
        <draw:custom-shape draw:name="Text 41" draw:style-name="gr4" draw:text-style-name="P30" draw:layer="layout" svg:width="27.685cm" svg:height="1.483cm" svg:x="2.794cm" svg:y="14.329cm">
          <text:p text:style-name="P29"><text:span text:style-name="T13">Datenlizenzen: </text:span></text:p>
          <text:p text:style-name="P29"><text:span text:style-name="T14">ENTSO-E, CC BY-SA 4.0</text:span></text:p>
          <draw:enhanced-geometry svg:viewBox="0 0 21600 21600" draw:type="rectangle" draw:enhanced-path="M 0 0 L 21600 0 21600 21600 0 21600 0 0 Z N"/>
        </draw:custom-shape>
        <draw:custom-shape draw:name="Text 42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3" draw:style-name="gr4" draw:text-style-name="P10" draw:layer="layout" svg:width="1.269cm" svg:height="0.558cm" svg:x="31.115cm" svg:y="18.136cm">
          <text:p text:style-name="P15"><text:span text:style-name="T15">3</text:span></text:p>
          <draw:enhanced-geometry svg:viewBox="0 0 21600 21600" draw:type="rectangle" draw:enhanced-path="M 0 0 L 21600 0 21600 21600 0 21600 0 0 Z N"/>
        </draw:custom-shape>
        <draw:line draw:name="Shape 5" draw:style-name="gr28" draw:text-style-name="P17" draw:layer="layout" svg:x1="22.123cm" svg:y1="6.223cm" svg:x2="24.337cm" svg:y2="6.223cm">
          <text:p/>
        </draw:line>
        <draw:custom-shape draw:name="Shape 18" draw:style-name="gr29" draw:text-style-name="P2" draw:layer="layout" svg:width="0.304cm" svg:height="0.304cm" svg:x="24.2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4" draw:text-style-name="P31" draw:layer="layout" svg:width="1.46cm" svg:height="0.558cm" svg:x="23.812cm" svg:y="6.731cm">
          <text:p text:style-name="P27"><text:span text:style-name="T16">2025.0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4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EDA</text:span></text:p>
          <draw:enhanced-geometry svg:viewBox="0 0 21600 21600" draw:type="rectangle" draw:enhanced-path="M 0 0 L 21600 0 21600 21600 0 21600 0 0 Z N"/>
        </draw:custom-shape>
        <draw:custom-shape draw:name="Text 2" draw:style-name="gr30" draw:text-style-name="P26" draw:layer="layout" svg:width="28.037cm" svg:height="1.421cm" svg:x="1.524cm" svg:y="1.067cm">
          <text:p text:style-name="P9"><text:span text:style-name="T8">EDA: Saison, Trend und zeitliche Verteilung und Effekte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frame draw:name="Image 1" draw:style-name="gr31" draw:text-style-name="P17" draw:layer="layout" svg:width="9cm" svg:height="6.69cm" svg:x="1.553cm" svg:y="6.346cm">
          <draw:image xlink:href="Pictures/1000020100000276000001D533415BAE.png" xlink:type="simple" xlink:show="embed" xlink:actuate="onLoad">
            <text:p/>
          </draw:image>
        </draw:frame>
        <draw:custom-shape draw:name="Shape 6" draw:style-name="gr19" draw:text-style-name="P2" draw:layer="layout" svg:width="29.336cm" svg:height="2.919cm" svg:x="2.159cm" svg:y="14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4" draw:text-style-name="P30" draw:layer="layout" svg:width="27.685cm" svg:height="2.44cm" svg:x="2.794cm" svg:y="14.775cm">
          <text:p text:style-name="P29"><text:span text:style-name="T13">Erkenntnisse</text:span></text:p>
          <text:list text:style-name="L3">
            <text:list-item>
              <text:p text:style-name="P29"><text:span text:style-name="T14">Der Stromverbrauch hat deutliche Stunden-, Wochentages-, Monats-Saisonalität.</text:span></text:p>
            </text:list-item>
            <text:list-item>
              <text:p text:style-name="P29"><text:span text:style-name="T14">Der Stromverbrauch ist an arbeitsfreien Tage deutlich niedriger als sonst. </text:span></text:p>
            </text:list-item>
            <text:list-item>
              <text:p text:style-name="P29"><text:span text:style-name="T14">Langzeit-Trend ist in langen Zyklen enthalten. Für Langzeitprognose muss diese berücksichtigt werden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10" draw:layer="layout" svg:width="1.269cm" svg:height="0.558cm" svg:x="31.115cm" svg:y="18.136cm">
          <text:p text:style-name="P15"><text:span text:style-name="T15">4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21cm" svg:height="4.38cm" svg:x="10.958cm" svg:y="3.331cm">
          <draw:image xlink:href="Pictures/100000000000056D00000122077B00B7.png" xlink:type="simple" xlink:show="embed" xlink:actuate="onLoad">
            <text:p/>
          </draw:image>
        </draw:frame>
        <draw:frame draw:style-name="gr32" draw:text-style-name="P1" draw:layer="layout" svg:width="9cm" svg:height="2.59cm" svg:x="1.585cm" svg:y="3.326cm">
          <draw:image xlink:href="Pictures/1000000000000366000000FAA2C41336.png" xlink:type="simple" xlink:show="embed" xlink:actuate="onLoad">
            <text:p/>
          </draw:image>
        </draw:frame>
        <draw:frame draw:style-name="gr32" draw:text-style-name="P1" draw:layer="layout" svg:width="11.16cm" svg:height="5.5cm" svg:x="11.014cm" svg:y="7.897cm">
          <draw:image xlink:href="Pictures/10000000000003E0000001E9B186BA7C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page5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32" draw:layer="layout" svg:width="6.476cm" svg:height="0.609cm" svg:x="25.527cm" svg:y="0.813cm">
          <text:p text:style-name="P15"><text:span text:style-name="T7">EDA</text:span></text:p>
          <draw:enhanced-geometry svg:viewBox="0 0 21600 21600" draw:type="rectangle" draw:enhanced-path="M 0 0 L 21600 0 21600 21600 0 21600 0 0 Z N"/>
        </draw:custom-shape>
        <draw:custom-shape draw:name="Text 2" draw:style-name="gr33" draw:text-style-name="P26" draw:layer="layout" svg:width="28.037cm" svg:height="1.421cm" svg:x="1.524cm" svg:y="1.067cm">
          <text:p text:style-name="P9"><text:span text:style-name="T8">EDA: Wettereinfluss auf Stromverbrauch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Shape 6" draw:style-name="gr19" draw:text-style-name="P2" draw:layer="layout" svg:width="29.336cm" svg:height="2.463cm" svg:x="2.159cm" svg:y="15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34" draw:text-style-name="P30" draw:layer="layout" svg:width="27.685cm" svg:height="1.846cm" svg:x="2.794cm" svg:y="15.271cm">
          <text:p text:style-name="P29"><text:span text:style-name="T13">Erkenntnisse</text:span></text:p>
          <text:list text:style-name="L3">
            <text:list-item>
              <text:p text:style-name="P29"><text:span text:style-name="T14">Der Stromverbrauch hat Zusammenhang mit der Temperatur, Sonnenstrahlung und Windgeschwindigkeit.</text:span></text:p>
            </text:list-item>
            <text:list-item>
              <text:p text:style-name="P29"><text:span text:style-name="T14">Der Niederschlag spielt eher eine kleine Rolle und fügen womöglich Rauschen in das Modell ei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4" draw:text-style-name="P33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2" draw:layer="layout" svg:width="1.269cm" svg:height="0.558cm" svg:x="31.115cm" svg:y="18.136cm">
          <text:p text:style-name="P15"><text:span text:style-name="T15">4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7.03cm" svg:height="5cm" svg:x="16.571cm" svg:y="9.041cm">
          <draw:image xlink:href="Pictures/100000000000023800000194CB6EB5DA.png" xlink:type="simple" xlink:show="embed" xlink:actuate="onLoad">
            <text:p/>
          </draw:image>
        </draw:frame>
        <draw:frame draw:style-name="gr32" draw:text-style-name="P1" draw:layer="layout" svg:width="6.94cm" svg:height="5cm" svg:x="24.206cm" svg:y="9.059cm">
          <draw:image xlink:href="Pictures/100000000000023100000194252BC3F5.png" xlink:type="simple" xlink:show="embed" xlink:actuate="onLoad">
            <text:p/>
          </draw:image>
        </draw:frame>
        <draw:frame draw:style-name="gr32" draw:text-style-name="P1" draw:layer="layout" svg:width="12.15cm" svg:height="5cm" svg:x="2.482cm" svg:y="9.035cm">
          <draw:image xlink:href="Pictures/10000000000003990000017B66E128FB.png" xlink:type="simple" xlink:show="embed" xlink:actuate="onLoad">
            <text:p/>
          </draw:image>
        </draw:frame>
        <draw:frame draw:style-name="gr32" draw:text-style-name="P1" draw:layer="layout" svg:width="12.06cm" svg:height="5cm" svg:x="15.588cm" svg:y="3.166cm">
          <draw:image xlink:href="Pictures/10000000000003920000017BEF8281C4.png" xlink:type="simple" xlink:show="embed" xlink:actuate="onLoad">
            <text:p/>
          </draw:image>
        </draw:frame>
        <draw:frame draw:style-name="gr32" draw:text-style-name="P1" draw:layer="layout" svg:width="12.08cm" svg:height="5cm" svg:x="2.48cm" svg:y="3.221cm">
          <draw:image xlink:href="Pictures/10000000000003940000017B26665A71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5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PIPELINE</text:span></text:p>
          <draw:enhanced-geometry svg:viewBox="0 0 21600 21600" draw:type="rectangle" draw:enhanced-path="M 0 0 L 21600 0 21600 21600 0 21600 0 0 Z N"/>
        </draw:custom-shape>
        <draw:custom-shape draw:name="Text 2" draw:style-name="gr35" draw:text-style-name="P26" draw:layer="layout" svg:width="28.835cm" svg:height="1.421cm" svg:x="1.524cm" svg:y="1.067cm">
          <text:p text:style-name="P9"><text:span text:style-name="T8">Feature Engineering: starke Signale statt Modellkomplexität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Text 4" draw:style-name="gr4" draw:text-style-name="P19" draw:layer="layout" svg:width="29.838cm" svg:height="1.066cm" svg:x="1.524cm" svg:y="3.048cm">
          <text:p text:style-name="P18"><text:span text:style-name="T9">Die größte Qualitätssteigerung entsteht durch saubere Zeitreihenfeatures und Lecksichere Rolling-Werte.</text:span></text:p>
          <draw:enhanced-geometry svg:viewBox="0 0 21600 21600" draw:type="rectangle" draw:enhanced-path="M 0 0 L 21600 0 21600 21600 0 21600 0 0 Z N"/>
        </draw:custom-shape>
        <draw:custom-shape draw:name="Shape 5" draw:style-name="gr26" draw:text-style-name="P2" draw:layer="layout" svg:width="9.016cm" svg:height="7.746cm" svg:x="2.08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7" draw:text-style-name="P2" draw:layer="layout" svg:width="9.016cm" svg:height="0.304cm" svg:x="2.083cm" svg:y="5.08cm">
          <text:p/>
          <draw:enhanced-geometry svg:viewBox="0 0 21600 21600" draw:type="rectangle" draw:enhanced-path="M 0 0 L 21600 0 21600 21600 0 21600 0 0 Z N"/>
        </draw:custom-shape>
        <draw:custom-shape draw:name="Text 7" draw:style-name="gr4" draw:text-style-name="P35" draw:layer="layout" svg:width="7.111cm" svg:height="0.812cm" svg:x="2.718cm" svg:y="6.015cm">
          <text:p text:style-name="P5"><text:span text:style-name="T19">Zeit &amp; Kalender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35" draw:layer="layout" svg:width="7.746cm" svg:height="4.19cm" svg:x="2.769cm" svg:y="7.061cm">
          <text:list text:style-name="L3">
            <text:list-item>
              <text:p text:style-name="P5"><text:span text:style-name="T20">hour, weekday, month</text:span></text:p>
            </text:list-item>
            <text:list-item>
              <text:p text:style-name="P5"><text:span text:style-name="T20">is_weekend, is_workday</text:span></text:p>
            </text:list-item>
            <text:list-item>
              <text:p text:style-name="P5"><text:span text:style-name="T20">is_holiday, is_bridge_day</text:span></text:p>
              <text:p text:style-name="P5"><text:span text:style-name="T20">holiday_ratio, holiday_weight</text:span></text:p>
            </text:list-item>
            <text:list-item>
              <text:p text:style-name="P5"><text:span text:style-name="T20">is_pandemic_ti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9" draw:style-name="gr26" draw:text-style-name="P2" draw:layer="layout" svg:width="9.016cm" svg:height="7.746cm" svg:x="12.4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7" draw:text-style-name="P2" draw:layer="layout" svg:width="9.016cm" svg:height="0.304cm" svg:x="12.497cm" svg:y="5.08cm">
          <text:p/>
          <draw:enhanced-geometry svg:viewBox="0 0 21600 21600" draw:type="rectangle" draw:enhanced-path="M 0 0 L 21600 0 21600 21600 0 21600 0 0 Z N"/>
        </draw:custom-shape>
        <draw:custom-shape draw:name="Text 11" draw:style-name="gr4" draw:text-style-name="P35" draw:layer="layout" svg:width="7.111cm" svg:height="0.812cm" svg:x="13.132cm" svg:y="6.015cm">
          <text:p text:style-name="P5"><text:span text:style-name="T19">Wetter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35" draw:layer="layout" svg:width="7.746cm" svg:height="4.19cm" svg:x="13.183cm" svg:y="7.061cm">
          <text:list text:style-name="L3">
            <text:list-item>
              <text:p text:style-name="P5"><text:span text:style-name="T20">apparent_temperature</text:span></text:p>
            </text:list-item>
            <text:list-item>
              <text:p text:style-name="P5"><text:span text:style-name="T20">rain / snowfall</text:span></text:p>
            </text:list-item>
            <text:list-item>
              <text:p text:style-name="P5"><text:span text:style-name="T20">wind_speed_10m</text:span></text:p>
            </text:list-item>
            <text:list-item>
              <text:p text:style-name="P5"><text:span text:style-name="T20">shortwave_radiation</text:span></text:p>
            </text:list-item>
            <text:list-item>
              <text:p text:style-name="P5"><text:span text:style-name="T20">heating/cooling_degre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3" draw:style-name="gr26" draw:text-style-name="P2" draw:layer="layout" svg:width="9.016cm" svg:height="7.746cm" svg:x="22.91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" draw:style-name="gr8" draw:text-style-name="P2" draw:layer="layout" svg:width="9.016cm" svg:height="0.304cm" svg:x="22.911cm" svg:y="5.08cm">
          <text:p/>
          <draw:enhanced-geometry svg:viewBox="0 0 21600 21600" draw:type="rectangle" draw:enhanced-path="M 0 0 L 21600 0 21600 21600 0 21600 0 0 Z N"/>
        </draw:custom-shape>
        <draw:custom-shape draw:name="Text 15" draw:style-name="gr4" draw:text-style-name="P35" draw:layer="layout" svg:width="7.111cm" svg:height="0.812cm" svg:x="23.546cm" svg:y="6.015cm">
          <text:p text:style-name="P5"><text:span text:style-name="T19">Historie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35" draw:layer="layout" svg:width="7.746cm" svg:height="4.19cm" svg:x="23.597cm" svg:y="7.061cm">
          <text:list text:style-name="L3">
            <text:list-item>
              <text:p text:style-name="P5"><text:span text:style-name="T20">lag_24h, lag_168h</text:span></text:p>
            </text:list-item>
            <text:list-item>
              <text:p text:style-name="P5"><text:span text:style-name="T20">rolling_mean_24h</text:span></text:p>
            </text:list-item>
            <text:list-item>
              <text:p text:style-name="P5"><text:span text:style-name="T20">rolling_mean_168h</text:span></text:p>
            </text:list-item>
            <text:list-item>
              <text:p text:style-name="P5"><text:span text:style-name="T20">shift(1) gegen Leakage</text:span></text:p>
            </text:list-item>
            <text:list-item>
              <text:p text:style-name="P5"><text:span text:style-name="T21">wichtigste Featur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7" draw:style-name="gr19" draw:text-style-name="P2" draw:layer="layout" svg:width="29.463cm" svg:height="2.183cm" svg:x="2.159cm" svg:y="14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36" draw:layer="layout" svg:width="27.177cm" svg:height="0.888cm" svg:x="2.794cm" svg:y="14.605cm">
          <text:p text:style-name="P29"><text:span text:style-name="T13">Eventuelle Erweiterungen:</text:span></text:p>
          <text:p text:style-name="P29"><text:span text:style-name="T14">Feiertagsnamen, Schulferienratio, Abstände zu Feiertage und ggf. Industrieproduktionsindex (für Langzeitprognose)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10" draw:layer="layout" svg:width="1.269cm" svg:height="0.558cm" svg:x="31.115cm" svg:y="18.136cm">
          <text:p text:style-name="P15"><text:span text:style-name="T15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6" draw:style-name="dp3" draw:master-page-name="Standard">
        <office:forms form:automatic-focus="false" form:apply-design-mode="false"/>
        <draw:custom-shape draw:name="Shape 5" draw:style-name="gr36" draw:text-style-name="P2" draw:layer="layout" svg:width="6.796cm" svg:height="5.651cm" svg:x="25.227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6" draw:style-name="gr19" draw:text-style-name="P2" draw:layer="layout" svg:width="30.043cm" svg:height="2.807cm" svg:x="1.981cm" svg:y="13.9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TRAINING</text:span></text:p>
          <draw:enhanced-geometry svg:viewBox="0 0 21600 21600" draw:type="rectangle" draw:enhanced-path="M 0 0 L 21600 0 21600 21600 0 21600 0 0 Z N"/>
        </draw:custom-shape>
        <draw:custom-shape draw:name="Text 2" draw:style-name="gr37" draw:text-style-name="P26" draw:layer="layout" svg:width="29.314cm" svg:height="1.421cm" svg:x="1.524cm" svg:y="1.067cm">
          <text:p text:style-name="P9"><text:span text:style-name="T8">Modellvergleich: XGBoost/LightGBM liegen nahe beieinander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Shape 5" draw:style-name="gr38" draw:text-style-name="P2" draw:layer="layout" svg:width="12.699cm" svg:height="0.964cm" svg:x="2.583cm" svg:y="3.602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12" draw:layer="layout" svg:width="3.86cm" svg:height="0.558cm" svg:x="2.71cm" svg:y="3.805cm">
          <text:p text:style-name="P9"><text:span text:style-name="T11">Modell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12" draw:layer="layout" svg:width="1.929cm" svg:height="0.558cm" svg:x="6.825cm" svg:y="3.805cm">
          <text:p text:style-name="P27"><text:span text:style-name="T11">MAE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12" draw:layer="layout" svg:width="2.133cm" svg:height="0.558cm" svg:x="9.009cm" svg:y="3.805cm">
          <text:p text:style-name="P27"><text:span text:style-name="T11">RMSE</text:span></text:p>
          <draw:enhanced-geometry svg:viewBox="0 0 21600 21600" draw:type="rectangle" draw:enhanced-path="M 0 0 L 21600 0 21600 21600 0 21600 0 0 Z N"/>
        </draw:custom-shape>
        <draw:custom-shape draw:name="Text 9" draw:style-name="gr4" draw:text-style-name="P12" draw:layer="layout" svg:width="1.167cm" svg:height="0.558cm" svg:x="11.397cm" svg:y="3.805cm">
          <text:p text:style-name="P27"><text:span text:style-name="T11">R²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12" draw:layer="layout" svg:width="1.828cm" svg:height="0.558cm" svg:x="12.819cm" svg:y="3.805cm">
          <text:p text:style-name="P27"><text:span text:style-name="T11">Dauer</text:span></text:p>
          <draw:enhanced-geometry svg:viewBox="0 0 21600 21600" draw:type="rectangle" draw:enhanced-path="M 0 0 L 21600 0 21600 21600 0 21600 0 0 Z N"/>
        </draw:custom-shape>
        <draw:custom-shape draw:name="Shape 11" draw:style-name="gr39" draw:text-style-name="P2" draw:layer="layout" svg:width="12.699cm" svg:height="0.99cm" svg:x="2.583cm" svg:y="4.567cm">
          <text:p/>
          <draw:enhanced-geometry svg:viewBox="0 0 21600 21600" draw:type="rectangle" draw:enhanced-path="M 0 0 L 21600 0 21600 21600 0 21600 0 0 Z N"/>
        </draw:custom-shape>
        <draw:custom-shape draw:name="Text 12" draw:style-name="gr4" draw:text-style-name="P38" draw:layer="layout" svg:width="3.86cm" svg:height="0.558cm" svg:x="2.71cm" svg:y="4.796cm">
          <text:p text:style-name="P37"><text:span text:style-name="T22">XGBoos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38" draw:layer="layout" svg:width="1.929cm" svg:height="0.558cm" svg:x="6.825cm" svg:y="4.796cm">
          <text:p text:style-name="P39"><text:span text:style-name="T22">1156.96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10" draw:layer="layout" svg:width="2.133cm" svg:height="0.558cm" svg:x="9.009cm" svg:y="4.796cm">
          <text:p text:style-name="P27"><text:span text:style-name="T4">1500.81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10" draw:layer="layout" svg:width="1.167cm" svg:height="0.558cm" svg:x="11.397cm" svg:y="4.796cm">
          <text:p text:style-name="P27"><text:span text:style-name="T4">0.97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10" draw:layer="layout" svg:width="1.828cm" svg:height="0.558cm" svg:x="12.819cm" svg:y="4.796cm">
          <text:p text:style-name="P27"><text:span text:style-name="T4">10′55″</text:span></text:p>
          <draw:enhanced-geometry svg:viewBox="0 0 21600 21600" draw:type="rectangle" draw:enhanced-path="M 0 0 L 21600 0 21600 21600 0 21600 0 0 Z N"/>
        </draw:custom-shape>
        <draw:line draw:name="Shape 17" draw:style-name="gr40" draw:text-style-name="P17" draw:layer="layout" svg:x1="2.582cm" svg:y1="5.557cm" svg:x2="15.282cm" svg:y2="5.557cm">
          <text:p/>
        </draw:line>
        <draw:custom-shape draw:name="Text 18" draw:style-name="gr4" draw:text-style-name="P10" draw:layer="layout" svg:width="3.86cm" svg:height="0.558cm" svg:x="2.71cm" svg:y="5.786cm">
          <text:p text:style-name="P9"><text:span text:style-name="T4">LightGBM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10" draw:layer="layout" svg:width="1.929cm" svg:height="0.558cm" svg:x="6.825cm" svg:y="5.786cm">
          <text:p text:style-name="P27"><text:span text:style-name="T4"><text:s/></text:span><text:span text:style-name="T4">1219.06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10" draw:layer="layout" svg:width="2.133cm" svg:height="0.558cm" svg:x="9.009cm" svg:y="5.786cm">
          <text:p text:style-name="P27"><text:span text:style-name="T4">1604.48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10" draw:layer="layout" svg:width="1.167cm" svg:height="0.558cm" svg:x="11.397cm" svg:y="5.786cm">
          <text:p text:style-name="P27"><text:span text:style-name="T4">0.97</text:span></text:p>
          <draw:enhanced-geometry svg:viewBox="0 0 21600 21600" draw:type="rectangle" draw:enhanced-path="M 0 0 L 21600 0 21600 21600 0 21600 0 0 Z N"/>
        </draw:custom-shape>
        <draw:custom-shape draw:name="Text 22" draw:style-name="gr4" draw:text-style-name="P10" draw:layer="layout" svg:width="1.828cm" svg:height="0.558cm" svg:x="12.819cm" svg:y="5.786cm">
          <text:p text:style-name="P27"><text:span text:style-name="T4">2′30″</text:span></text:p>
          <draw:enhanced-geometry svg:viewBox="0 0 21600 21600" draw:type="rectangle" draw:enhanced-path="M 0 0 L 21600 0 21600 21600 0 21600 0 0 Z N"/>
        </draw:custom-shape>
        <draw:line draw:name="Shape 23" draw:style-name="gr41" draw:text-style-name="P17" draw:layer="layout" svg:x1="2.582cm" svg:y1="6.548cm" svg:x2="15.282cm" svg:y2="6.548cm">
          <text:p/>
        </draw:line>
        <draw:custom-shape draw:name="Text 31" draw:style-name="gr42" draw:text-style-name="P30" draw:layer="layout" svg:width="29.178cm" svg:height="3.174cm" svg:x="2.458cm" svg:y="13.346cm">
          <text:p text:style-name="P29"><text:span text:style-name="T13"/></text:p>
          <text:p text:style-name="P29"><text:span text:style-name="T13">Erkenntnisse</text:span></text:p>
          <text:list text:style-name="L3">
            <text:list-item>
              <text:p text:style-name="P29"><text:span text:style-name="T14">Beide Modelle profitieren stark von Lag-/Rolling-Features.</text:span></text:p>
            </text:list-item>
            <text:list-item>
              <text:p text:style-name="P29"><text:span text:style-name="T14">XGBoost liefert die beste MAE, LightGBM ist fast gleich gut und schnell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0" draw:style-name="gr31" draw:text-style-name="P17" draw:layer="layout" svg:width="10cm" svg:height="5.97cm" svg:x="1.981cm" svg:y="7.432cm">
          <draw:image xlink:href="Pictures/100002010000022300000147150249BA.png" xlink:type="simple" xlink:show="embed" xlink:actuate="onLoad">
            <text:p/>
          </draw:image>
        </draw:frame>
        <draw:frame draw:name="Image 1" draw:style-name="gr31" draw:text-style-name="P17" draw:layer="layout" svg:width="10cm" svg:height="5.97cm" svg:x="13.246cm" svg:y="7.423cm">
          <draw:image xlink:href="Pictures/1000020100000223000001476FC2C542.png" xlink:type="simple" xlink:show="embed" xlink:actuate="onLoad">
            <text:p/>
          </draw:image>
        </draw:frame>
        <draw:custom-shape draw:name="Text 35" draw:style-name="gr4" draw:text-style-name="P30" draw:layer="layout" svg:width="5.597cm" svg:height="6.02cm" svg:x="25.92cm" svg:y="2.676cm">
          <text:p text:style-name="P29"><text:span text:style-name="T13">Lernkurven: </text:span></text:p>
          <text:p text:style-name="P29"><text:span text:style-name="T13"/></text:p>
          <text:list text:style-name="L1">
            <text:list-item>
              <text:p text:style-name="P29"><text:span text:style-name="T14">Validierungsfehler sinkt mit mehr Daten, stagniert bei 13000 Datenpunkt. </text:span></text:p>
            </text:list-item>
            <text:list-item>
              <text:p text:style-name="P29"><text:span text:style-name="T14">Der Lücke zum Trainingsfehler bleibt aber sichtba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38" draw:style-name="gr43" draw:text-style-name="P10" draw:layer="layout" svg:width="15.747cm" svg:height="1.142cm" svg:x="16.205cm" svg:y="13.143cm">
          <text:p/>
          <draw:enhanced-geometry svg:viewBox="0 0 21600 21600" draw:type="rectangle" draw:enhanced-path="M 0 0 L 21600 0 21600 21600 0 21600 0 0 Z N"/>
        </draw:custom-shape>
        <draw:custom-shape draw:name="Text 39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0" draw:style-name="gr4" draw:text-style-name="P10" draw:layer="layout" svg:width="1.269cm" svg:height="0.558cm" svg:x="31.115cm" svg:y="18.136cm">
          <text:p text:style-name="P15"><text:span text:style-name="T15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7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7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ERKLÄRBARKEIT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6" draw:layer="layout" svg:width="23.494cm" svg:height="1.421cm" svg:x="1.524cm" svg:y="1.067cm">
          <text:p text:style-name="P9"><text:span text:style-name="T8">Feature Importances: Vorwoche schlägt Wetter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Shape 5" draw:style-name="gr44" draw:text-style-name="P2" draw:layer="layout" svg:width="6.751cm" svg:height="7.431cm" svg:x="25.227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397.862867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45" draw:text-style-name="P30" draw:layer="layout" svg:width="5.286cm" svg:height="7.481cm" svg:x="25.82cm" svg:y="3.246cm">
          <text:p text:style-name="P29"><text:span text:style-name="T13">Erkenntnisse</text:span></text:p>
          <text:p text:style-name="P29"><text:span text:style-name="T13"/></text:p>
          <text:list text:style-name="L3">
            <text:list-item>
              <text:p text:style-name="P29"><text:span text:style-name="T14">Verbrauch der Vorwoche (`lag_168h`) ist der stärkste Saisonalitätsanker</text:span></text:p>
            </text:list-item>
            <text:list-item>
              <text:p text:style-name="P29"><text:span text:style-name="T14">Tageswerte (`lag_24h`) und Rolling Means stabilisieren kurzfristige Schwankungen</text:span></text:p>
            </text:list-item>
            <text:list-item>
              <text:p text:style-name="P29"><text:span text:style-name="T14">Wetterfeatures liefern Zusatzsignal, aber erklären nicht all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19" draw:text-style-name="P2" draw:layer="layout" svg:width="29.463cm" svg:height="1.86cm" svg:x="2.159cm" svg:y="15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0" draw:style-name="gr46" draw:text-style-name="P30" draw:layer="layout" svg:width="28.363cm" svg:height="0.761cm" svg:x="2.794cm" svg:y="15.973cm">
          <text:p text:style-name="P29"><text:span text:style-name="T13">Hinweis</text:span></text:p>
          <text:p text:style-name="P29"><text:span text:style-name="T14">Feature Importance nicht als Kausalität interpretieren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10" draw:layer="layout" svg:width="1.269cm" svg:height="0.558cm" svg:x="31.115cm" svg:y="18.136cm">
          <text:p text:style-name="P15"><text:span text:style-name="T15">7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9.61cm" svg:height="12cm" svg:x="3.129cm" svg:y="2.912cm">
          <draw:image xlink:href="Pictures/1000000000000467000002B2B40CF180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8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page9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32" draw:layer="layout" svg:width="6.476cm" svg:height="0.609cm" svg:x="25.527cm" svg:y="0.813cm">
          <text:p text:style-name="P15"><text:span text:style-name="T7">ANWEND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26" draw:layer="layout" svg:width="28.721cm" svg:height="1.421cm" svg:x="1.524cm" svg:y="1.067cm">
          <text:p text:style-name="P9"><text:span text:style-name="T8">Tagesprognose für morgen: Streamlit/</text:span><text:span text:style-name="T8">Interactive Notebook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Shape 5" draw:style-name="gr36" draw:text-style-name="P2" draw:layer="layout" svg:width="6.795cm" svg:height="7.841cm" svg:x="25.227cm" svg:y="3.175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47" draw:text-style-name="P30" draw:layer="layout" svg:width="5.925cm" svg:height="6.546cm" svg:x="25.797cm" svg:y="3.718cm">
          <text:p text:style-name="P29"><text:span text:style-name="T13">Nutzen der GUI</text:span></text:p>
          <text:p text:style-name="P29"><text:span text:style-name="T13"/></text:p>
          <text:list text:style-name="L3">
            <text:list-item>
              <text:p text:style-name="P29"><text:span text:style-name="T14">Tagesprognose sofort sichtbar</text:span></text:p>
            </text:list-item>
            <text:list-item>
              <text:p text:style-name="P29"><text:span text:style-name="T14">SMARD-Prognose als Referenz</text:span></text:p>
            </text:list-item>
            <text:list-item>
              <text:p text:style-name="P29"><text:span text:style-name="T14">Tabellarische Werte für Export/Prüfung</text:span></text:p>
            </text:list-item>
            <text:list-item>
              <text:p text:style-name="P29"><text:span text:style-name="T14">Modellauswahlt </text:span></text:p>
              <text:list>
                <text:list-item>
                  <text:p text:style-name="P29"><text:span text:style-name="T14">LightGBM</text:span></text:p>
                </text:list-item>
                <text:list-item>
                  <text:p text:style-name="P29"><text:span text:style-name="T14">LightGBM_conservative</text:span></text:p>
                </text:list-item>
                <text:list-item>
                  <text:p text:style-name="P29"><text:span text:style-name="T14">XGBoost</text:span></text:p>
                </text:list-item>
                <text:list-item>
                  <text:p text:style-name="P29"><text:span text:style-name="T14">XGBoost_conservativ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48" draw:text-style-name="P2" draw:layer="layout" svg:width="3.25cm" svg:height="2.5cm" svg:x="25.529cm" svg:y="11.5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3" draw:text-style-name="P2" draw:layer="layout" svg:width="0.25cm" svg:height="1.5cm" svg:x="25.857cm" svg:y="12.092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40" draw:layer="layout" svg:width="2.285cm" svg:height="0.863cm" svg:x="26.492cm" svg:y="11.936cm">
          <text:p text:style-name="P9"><text:span text:style-name="T23">SMARD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41" draw:layer="layout" svg:width="2.285cm" svg:height="0.71cm" svg:x="26.492cm" svg:y="12.952cm">
          <text:p text:style-name="P9"><text:span text:style-name="T24">Vergleichslinie</text:span></text:p>
          <draw:enhanced-geometry svg:viewBox="0 0 21600 21600" draw:type="rectangle" draw:enhanced-path="M 0 0 L 21600 0 21600 21600 0 21600 0 0 Z N"/>
        </draw:custom-shape>
        <draw:custom-shape draw:name="Shape 12" draw:style-name="gr48" draw:text-style-name="P2" draw:layer="layout" svg:width="2.94cm" svg:height="2.5cm" svg:x="29.11cm" svg:y="11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2" draw:layer="layout" svg:width="0.27cm" svg:height="1.5cm" svg:x="29.413cm" svg:y="12.109cm">
          <text:p/>
          <draw:enhanced-geometry svg:viewBox="0 0 21600 21600" draw:type="rectangle" draw:enhanced-path="M 0 0 L 21600 0 21600 21600 0 21600 0 0 Z N"/>
        </draw:custom-shape>
        <draw:custom-shape draw:name="Text 14" draw:style-name="gr4" draw:text-style-name="P40" draw:layer="layout" svg:width="2.158cm" svg:height="0.863cm" svg:x="30.048cm" svg:y="11.936cm">
          <text:p text:style-name="P9"><text:span text:style-name="T23">ML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41" draw:layer="layout" svg:width="2.158cm" svg:height="0.71cm" svg:x="30.048cm" svg:y="12.952cm">
          <text:p text:style-name="P9"><text:span text:style-name="T24">Prognose</text:span></text:p>
          <draw:enhanced-geometry svg:viewBox="0 0 21600 21600" draw:type="rectangle" draw:enhanced-path="M 0 0 L 21600 0 21600 21600 0 21600 0 0 Z N"/>
        </draw:custom-shape>
        <draw:custom-shape draw:name="Shape 16" draw:style-name="gr19" draw:text-style-name="P2" draw:layer="layout" svg:width="29.463cm" svg:height="2.009cm" svg:x="2.159cm" svg:y="15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9" draw:text-style-name="P30" draw:layer="layout" svg:width="27.873cm" svg:height="1.46cm" svg:x="2.486cm" svg:y="15.306cm">
          <text:p text:style-name="P29"><text:span text:style-name="T13">Erkenntnis</text:span></text:p>
          <text:p text:style-name="P29"><text:span text:style-name="T14">Tagesvorhersage folgt dem täglichen Muster. 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33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32" draw:layer="layout" svg:width="1.269cm" svg:height="0.558cm" svg:x="31.115cm" svg:y="18.136cm">
          <text:p text:style-name="P15"><text:span text:style-name="T15">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cm" svg:height="10.31cm" svg:x="1.52cm" svg:y="3.332cm">
          <draw:image xlink:href="Pictures/10000201000009300000041EEC6E72C0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9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9" draw:style-name="dp3" draw:master-page-name="Standard">
        <office:forms form:automatic-focus="false" form:apply-design-mode="false"/>
        <draw:custom-shape draw:name="Shape 5" draw:style-name="gr36" draw:text-style-name="P2" draw:layer="layout" svg:width="6.805cm" svg:height="8.685cm" svg:x="25.218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6" draw:layer="layout" svg:width="23.494cm" svg:height="1.421cm" svg:x="1.524cm" svg:y="1.067cm">
          <text:p text:style-name="P9"><text:span text:style-name="T8">Historischer Vergleich: Real vs. SMARD vs. ML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Text 6" draw:style-name="gr50" draw:text-style-name="P30" draw:layer="layout" svg:width="5.77cm" svg:height="6.546cm" svg:x="25.82cm" svg:y="3.963cm">
          <text:p text:style-name="P29"><text:span text:style-name="T13">Nutzen der GUI</text:span></text:p>
          <text:p text:style-name="P29"><text:span text:style-name="T13"/></text:p>
          <text:list text:style-name="L3">
            <text:list-item>
              <text:p text:style-name="P29"><text:span text:style-name="T14">Anfang und Ende der Zeit für die Vorhersage.</text:span></text:p>
            </text:list-item>
            <text:list-item>
              <text:p text:style-name="P29"><text:span text:style-name="T14">Empfehlung: Feiertage und Ferienzeiten auswählen für die Sonderfällen</text:span></text:p>
            </text:list-item>
            <text:list-item>
              <text:p text:style-name="P29"><text:span text:style-name="T14">Vergleich mit SMARD Prognose</text:span></text:p>
            </text:list-item>
            <text:list-item>
              <text:p text:style-name="P29"><text:span text:style-name="T14">Modellauswahlt </text:span></text:p>
              <text:list>
                <text:list-item>
                  <text:p text:style-name="P29"><text:span text:style-name="T14">LightGBM</text:span></text:p>
                </text:list-item>
                <text:list-item>
                  <text:p text:style-name="P29"><text:span text:style-name="T14">LightGBM_conservative</text:span></text:p>
                </text:list-item>
                <text:list-item>
                  <text:p text:style-name="P29"><text:span text:style-name="T14">XGBoost</text:span></text:p>
                </text:list-item>
                <text:list-item>
                  <text:p text:style-name="P29"><text:span text:style-name="T14">XGBoost_conservative <text:s/>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48" draw:text-style-name="P2" draw:layer="layout" svg:width="3.17cm" svg:height="2.5cm" svg:x="25.292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7" draw:text-style-name="P2" draw:layer="layout" svg:width="0.25cm" svg:height="1.5cm" svg:x="25.592cm" svg:y="12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9" draw:style-name="gr4" draw:text-style-name="P42" draw:layer="layout" svg:width="2.285cm" svg:height="0.863cm" svg:x="26.027cm" svg:y="12.766cm">
          <text:p text:style-name="P9"><text:span text:style-name="T23">MAE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43" draw:layer="layout" svg:width="2.285cm" svg:height="0.71cm" svg:x="26.027cm" svg:y="13.782cm">
          <text:p text:style-name="P9"><text:span text:style-name="T24">Primäre Metrik</text:span></text:p>
          <draw:enhanced-geometry svg:viewBox="0 0 21600 21600" draw:type="rectangle" draw:enhanced-path="M 0 0 L 21600 0 21600 21600 0 21600 0 0 Z N"/>
        </draw:custom-shape>
        <draw:custom-shape draw:name="Shape 11" draw:style-name="gr48" draw:text-style-name="P2" draw:layer="layout" svg:width="3.17cm" svg:height="2.5cm" svg:x="28.848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7" draw:text-style-name="P2" draw:layer="layout" svg:width="0.25cm" svg:height="1.5cm" svg:x="29.148cm" svg:y="12.809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42" draw:layer="layout" svg:width="2.285cm" svg:height="0.863cm" svg:x="29.583cm" svg:y="12.666cm">
          <text:p text:style-name="P9"><text:span text:style-name="T23">RMSE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43" draw:layer="layout" svg:width="2.285cm" svg:height="0.71cm" svg:x="29.683cm" svg:y="13.682cm">
          <text:p text:style-name="P9"><text:span text:style-name="T24">Nebenmetrik</text:span></text:p>
          <draw:enhanced-geometry svg:viewBox="0 0 21600 21600" draw:type="rectangle" draw:enhanced-path="M 0 0 L 21600 0 21600 21600 0 21600 0 0 Z N"/>
        </draw:custom-shape>
        <draw:custom-shape draw:name="Shape 15" draw:style-name="gr19" draw:text-style-name="P2" draw:layer="layout" svg:width="29.463cm" svg:height="2.04cm" svg:x="2.159cm" svg:y="15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10" draw:layer="layout" svg:width="1.269cm" svg:height="0.558cm" svg:x="31.115cm" svg:y="18.136cm">
          <text:p text:style-name="P15"><text:span text:style-name="T15">9</text:span></text:p>
          <draw:enhanced-geometry svg:viewBox="0 0 21600 21600" draw:type="rectangle" draw:enhanced-path="M 0 0 L 21600 0 21600 21600 0 21600 0 0 Z N"/>
        </draw:custom-shape>
        <draw:custom-shape draw:name="Text 18" draw:style-name="gr51" draw:text-style-name="P30" draw:layer="layout" svg:width="27.873cm" svg:height="1.46cm" svg:x="2.486cm" svg:y="15.607cm">
          <text:p text:style-name="P29"><text:span text:style-name="T13">Erkenntnis</text:span></text:p>
          <text:p text:style-name="P29"><text:span text:style-name="T14">Tagesvorhersage folgt dem täglichen Muster. SMARD Prognose ist höher als die Vorhersage, eher konservativ. <text:s/>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22.52cm" svg:height="9.5cm" svg:x="1.653cm" svg:y="3.237cm">
          <draw:image xlink:href="Pictures/10000201000005F800000285016D291D.png" xlink:type="simple" xlink:show="embed" xlink:actuate="onLoad">
            <text:p/>
          </draw:image>
        </draw:frame>
        <draw:frame draw:style-name="gr32" draw:text-style-name="P1" draw:layer="layout" svg:width="8.42cm" svg:height="2cm" svg:x="1.953cm" svg:y="13.135cm">
          <draw:image xlink:href="Pictures/10000201000002550000008EF97DABB2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0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page11" draw:style-name="dp3" draw:master-page-name="Standard">
        <office:forms form:automatic-focus="false" form:apply-design-mode="false"/>
        <draw:custom-shape draw:name="Shape 5" draw:style-name="gr36" draw:text-style-name="P2" draw:layer="layout" svg:width="6.796cm" svg:height="7.567cm" svg:x="25.227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32" draw:layer="layout" svg:width="6.476cm" svg:height="0.609cm" svg:x="25.527cm" svg:y="0.813cm">
          <text:p text:style-name="P15"><text:span text:style-name="T7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26" draw:layer="layout" svg:width="23.494cm" svg:height="1.421cm" svg:x="1.524cm" svg:y="1.067cm">
          <text:p text:style-name="P9"><text:span text:style-name="T8">Konservative Vorhersage: mehr Puffer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Text 5" draw:style-name="gr4" draw:text-style-name="P30" draw:layer="layout" svg:width="5.755cm" svg:height="7.22cm" svg:x="25.82cm" svg:y="3.135cm">
          <text:p text:style-name="P29"><text:span text:style-name="T13">Neues Modell:</text:span></text:p>
          <text:p text:style-name="P29"><text:span text:style-name="T13"/></text:p>
          <text:list text:style-name="L1">
            <text:list-item>
              <text:p text:style-name="P29"><text:span text:style-name="T14">Mit asymmetrischer Verlust werden die Modelle trainiert</text:span></text:p>
            </text:list-item>
            <text:list-item>
              <text:p text:style-name="P29"><text:span text:style-name="T14">Mit Parameter Alpha=0.95, 5% Unterschätzung</text:span></text:p>
            </text:list-item>
            <text:list-item>
              <text:p text:style-name="P29"><text:span text:style-name="T14">Die Metriken werden dadurch verschlechtert</text:span></text:p>
            </text:list-item>
            <text:list-item>
              <text:p text:style-name="P29"><text:span text:style-name="T14">Modelle:</text:span></text:p>
              <text:list>
                <text:list-item>
                  <text:p text:style-name="P29"><text:span text:style-name="T14">LGBM_conservative</text:span></text:p>
                </text:list-item>
                <text:list-item>
                  <text:p text:style-name="P29"><text:span text:style-name="T14">XGB_conservativ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6" draw:text-style-name="P2" draw:layer="layout" svg:width="3.17cm" svg:height="2.5cm" svg:x="25.292cm" svg:y="11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7" draw:text-style-name="P2" draw:layer="layout" svg:width="0.25cm" svg:height="1.5cm" svg:x="25.59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9" draw:style-name="gr4" draw:text-style-name="P40" draw:layer="layout" svg:width="2.285cm" svg:height="0.863cm" svg:x="26.227cm" svg:y="11.866cm">
          <text:p text:style-name="P9"><text:span text:style-name="T23">MAE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41" draw:layer="layout" svg:width="2.285cm" svg:height="0.71cm" svg:x="26.227cm" svg:y="12.882cm">
          <text:p text:style-name="P9"><text:span text:style-name="T24">Primäre Metrik</text:span></text:p>
          <draw:enhanced-geometry svg:viewBox="0 0 21600 21600" draw:type="rectangle" draw:enhanced-path="M 0 0 L 21600 0 21600 21600 0 21600 0 0 Z N"/>
        </draw:custom-shape>
        <draw:custom-shape draw:name="Shape 11" draw:style-name="gr6" draw:text-style-name="P2" draw:layer="layout" svg:width="3.17cm" svg:height="2.5cm" svg:x="28.848cm" svg:y="11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7" draw:text-style-name="P2" draw:layer="layout" svg:width="0.25cm" svg:height="1.5cm" svg:x="29.148cm" svg:y="11.909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40" draw:layer="layout" svg:width="2.285cm" svg:height="0.863cm" svg:x="29.783cm" svg:y="11.766cm">
          <text:p text:style-name="P9"><text:span text:style-name="T23">RMSE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41" draw:layer="layout" svg:width="2.285cm" svg:height="0.71cm" svg:x="29.783cm" svg:y="12.782cm">
          <text:p text:style-name="P9"><text:span text:style-name="T24">Nebenmetrik</text:span></text:p>
          <draw:enhanced-geometry svg:viewBox="0 0 21600 21600" draw:type="rectangle" draw:enhanced-path="M 0 0 L 21600 0 21600 21600 0 21600 0 0 Z N"/>
        </draw:custom-shape>
        <draw:custom-shape draw:name="Shape 15" draw:style-name="gr19" draw:text-style-name="P2" draw:layer="layout" svg:width="29.463cm" svg:height="2.412cm" svg:x="2.159cm" svg:y="15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33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32" draw:layer="layout" svg:width="1.269cm" svg:height="0.558cm" svg:x="31.115cm" svg:y="18.136cm">
          <text:p text:style-name="P15"><text:span text:style-name="T15">9</text:span></text:p>
          <draw:enhanced-geometry svg:viewBox="0 0 21600 21600" draw:type="rectangle" draw:enhanced-path="M 0 0 L 21600 0 21600 21600 0 21600 0 0 Z N"/>
        </draw:custom-shape>
        <draw:custom-shape draw:name="Text 18" draw:style-name="gr52" draw:text-style-name="P30" draw:layer="layout" svg:width="27.873cm" svg:height="1.782cm" svg:x="2.486cm" svg:y="15.485cm">
          <text:p text:style-name="P29"><text:span text:style-name="T13">Erkenntnis</text:span></text:p>
          <text:p text:style-name="P29"><text:span text:style-name="T14">Mit asymmetrischer Verlust weniger Unterschätzung für die Netzbetreiber. SMARD Prognose enthält vermutlich zusätzlich statisches Offset zu mehr Sicherheit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21.35cm" svg:height="9.5cm" svg:x="1.547cm" svg:y="3.196cm">
          <draw:image xlink:href="Pictures/10000201000004F80000023659B428A1.png" xlink:type="simple" xlink:show="embed" xlink:actuate="onLoad">
            <text:p/>
          </draw:image>
        </draw:frame>
        <draw:frame draw:style-name="gr32" draw:text-style-name="P1" draw:layer="layout" svg:width="9cm" svg:height="1.87cm" svg:x="1.879cm" svg:y="13.04cm">
          <draw:image xlink:href="Pictures/10000000000002AE0000008EA529D7DD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1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draw:page draw:name="Slide 10" draw:style-name="dp3" draw:master-page-name="Standard">
        <office:forms form:automatic-focus="false" form:apply-design-mode="false"/>
        <draw:custom-shape draw:name="Shape 0" draw:style-name="gr7" draw:text-style-name="P2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10" draw:layer="layout" svg:width="6.476cm" svg:height="0.609cm" svg:x="25.527cm" svg:y="0.813cm">
          <text:p text:style-name="P15"><text:span text:style-name="T7">ABSCHLUSS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6" draw:layer="layout" svg:width="23.494cm" svg:height="1.421cm" svg:x="1.524cm" svg:y="1.067cm">
          <text:p text:style-name="P9"><text:span text:style-name="T8">Fazit und Folgeprojekt</text:span></text:p>
          <draw:enhanced-geometry svg:viewBox="0 0 21600 21600" draw:type="rectangle" draw:enhanced-path="M 0 0 L 21600 0 21600 21600 0 21600 0 0 Z N"/>
        </draw:custom-shape>
        <draw:line draw:name="Shape 3" draw:style-name="gr15" draw:text-style-name="P17" draw:layer="layout" svg:x1="1.524cm" svg:y1="2.59cm" svg:x2="32.131cm" svg:y2="2.59cm">
          <text:p/>
        </draw:line>
        <draw:custom-shape draw:name="Shape 4" draw:style-name="gr53" draw:text-style-name="P2" draw:layer="layout" svg:width="14.223cm" svg:height="11.214cm" svg:x="2.159cm" svg:y="3.429cm">
          <text:p/>
          <draw:enhanced-geometry svg:viewBox="0 0 21600 21600" draw:path-stretchpoint-x="10800" draw:path-stretchpoint-y="10800" draw:text-areas="?f3 ?f4 ?f5 ?f6" draw:type="round-rectangle" draw:modifiers="1731.4667855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54" draw:text-style-name="P46" draw:layer="layout" svg:width="12.445cm" svg:height="11.045cm" svg:x="2.921cm" svg:y="3.533cm">
          <text:p text:style-name="P44"><text:span text:style-name="T25">Projektfazit</text:span></text:p>
          <text:list text:style-name="L3">
            <text:list-header>
              <text:p text:style-name="P44"><text:span text:style-name="T26"/></text:p>
            </text:list-header>
            <text:list-item>
              <text:p text:style-name="P45"><text:span text:style-name="T26">Das Portfolio-Projekt nutzt echte Daten, klare Pipeline, Modellvergleich und Demo-App.</text:span></text:p>
            </text:list-item>
            <text:list-item>
              <text:p text:style-name="P45"><text:span text:style-name="T26">Lag-/Rolling-Features sind der zentrale Performance-Treiber.</text:span></text:p>
            </text:list-item>
            <text:list-item>
              <text:p text:style-name="P45"><text:span text:style-name="T26">XGBoost/LightGBM sind derzeit die stärksten Kandidaten.</text:span></text:p>
            </text:list-item>
            <text:list-item>
              <text:p text:style-name="P45"><text:span text:style-name="T26">Der SMARD-Vergleich macht das Ergebnis praxisnah.</text:span></text:p>
            </text:list-item>
            <text:list-item>
              <text:p text:style-name="P45"><text:span text:style-name="T26">Die Diagnose in der Produktion ist eher konservativ</text:span></text:p>
            </text:list-item>
            <text:list-item>
              <text:p text:style-name="P45"><text:span text:style-name="T26">Mit der Erweiterung der asymmetrichen Verlust ist die Vorhersage noch produktionsnah </text:span></text:p>
            </text:list-item>
            <text:list-item>
              <text:p text:style-name="P45"><text:span text:style-name="T26">Automatische ETL Pipeline verbessert die App-Reation und die Datenkonsistenz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55" draw:text-style-name="P2" draw:layer="layout" svg:width="14.223cm" svg:height="11.214cm" svg:x="17.399cm" svg:y="3.4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9.9019170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56" draw:text-style-name="P49" draw:layer="layout" svg:width="12.572cm" svg:height="5.685cm" svg:x="18.161cm" svg:y="4.151cm">
          <text:p text:style-name="P47"><text:span text:style-name="T25">Nächste Schritte</text:span></text:p>
          <text:p text:style-name="P47"><text:span text:style-name="T25"/></text:p>
          <text:list text:style-name="L3">
            <text:list-item>
              <text:p text:style-name="P48"><text:span text:style-name="T26">Feiertags-/Brückentagsfehler separat evaluieren und Feature-Set erweitern.</text:span></text:p>
            </text:list-item>
            <text:list-item>
              <text:p text:style-name="P48"><text:span text:style-name="T26">Schulferienratio, Abstände (vor und nach) zu Feiertage hinzufügen </text:span></text:p>
            </text:list-item>
            <text:list-item>
              <text:p text:style-name="P48"><text:span text:style-name="T26">Industrieproduktionsindex testen.</text:span></text:p>
              <text:p text:style-name="P48"><text:span text:style-name="T2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0" draw:style-name="gr57" draw:text-style-name="P2" draw:layer="layout" svg:width="29.583cm" svg:height="2.053cm" svg:x="2.03cm" svg:y="15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1" draw:style-name="gr4" draw:text-style-name="P50" draw:layer="layout" svg:width="26.771cm" svg:height="1.162cm" svg:x="3.124cm" svg:y="15.801cm">
          <text:p text:style-name="P18"><text:span text:style-name="T27">To be continued: <text:s text:c="8"/>Vorhersage der Residuallast</text:span></text:p>
          <text:p text:style-name="P18"><text:span text:style-name="T28"><text:tab/></text:span><text:span text:style-name="T28"> <text:s text:c="28"/></text:span><text:span text:style-name="T28">Residuallast = Netzlast − PV − Wind − konventionelle Erzeugung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10" draw:layer="layout" svg:width="17.779cm" svg:height="0.558cm" svg:x="1.524cm" svg:y="18.136cm">
          <text:p text:style-name="P9"><text:span text:style-name="T15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10" draw:layer="layout" svg:width="1.269cm" svg:height="0.558cm" svg:x="31.115cm" svg:y="18.136cm">
          <text:p text:style-name="P15"><text:span text:style-name="T15">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2" presentation:class="page"/>
          <draw:frame draw:name="Notes Placeholder 2" presentation:style-name="pr1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ptos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pto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ptos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478cm" svg:height="3.18cm" svg:x="1.693cm" svg:y="0.76cm" presentation:class="title" presentation:placeholder="true">
        <draw:text-box/>
      </draw:frame>
      <draw:frame presentation:style-name="Standard-outline1" draw:layer="backgroundobjects" svg:width="30.478cm" svg:height="12.572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5-22T16:32:15.85</dc:date>
    <dc:creator>Yuchuan </dc:creator>
    <meta:generator>OpenOffice/4.1.15$Win32 OpenOffice.org_project/4115m2$Build-9813</meta:generator>
    <meta:editing-duration>PT19H34M48S</meta:editing-duration>
    <meta:editing-cycles>78</meta:editing-cycles>
    <meta:document-statistic meta:object-count="299"/>
  </office:meta>
</office:document-meta>
</file>