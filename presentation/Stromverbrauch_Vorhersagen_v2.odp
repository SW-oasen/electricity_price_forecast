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F800000285016D291D.png"/>
  <manifest:file-entry manifest:media-type="image/png" manifest:full-path="Pictures/10000201000006610000028D6DCD5E16.png"/>
  <manifest:file-entry manifest:media-type="image/png" manifest:full-path="Pictures/1000020100000276000001D533415BAE.png"/>
  <manifest:file-entry manifest:media-type="image/png" manifest:full-path="Pictures/1000020100000223000001476FC2C542.png"/>
  <manifest:file-entry manifest:media-type="image/png" manifest:full-path="Pictures/1000020100000366000001E1BBE6CECC.png"/>
  <manifest:file-entry manifest:media-type="image/png" manifest:full-path="Pictures/1000000000000467000002B2B40CF180.png"/>
  <manifest:file-entry manifest:media-type="image/png" manifest:full-path="Pictures/10000201000002550000008EF97DABB2.png"/>
  <manifest:file-entry manifest:media-type="image/png" manifest:full-path="Pictures/100002010000022300000147150249B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6f8fb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svg:stroke-color="#f4c430" draw:fill="solid" draw:fill-color="#00a8e8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35cm" svg:stroke-color="#f4c430" draw:fill="solid" draw:fill-color="#f4c430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5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6" style:family="graphic" style:parent-style-name="standard">
      <style:graphic-properties draw:stroke="solid" svg:stroke-width="0.035cm" svg:stroke-color="#e6ecf2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00a8e8" draw:fill="solid" draw:fill-color="#00a8e8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00a878" draw:fill="solid" draw:fill-color="#00a878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fill="solid" draw:fill-color="#0070c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solid" svg:stroke-width="0.035cm" svg:stroke-color="#d8e0ea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14" style:family="graphic" style:parent-style-name="standard">
      <style:graphic-properties draw:stroke="solid" svg:stroke-width="0.035cm" svg:stroke-color="#ffffff" svg:stroke-opacity="0%" draw:fill="solid" draw:fill-color="#00a8e8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ffffff" svg:stroke-opacity="0%" draw:fill="solid" draw:fill-color="#00a878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ffffff" svg:stroke-opacity="0%" draw:fill="solid" draw:fill-color="#f4c430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35cm" svg:stroke-color="#cbeaff" draw:fill="solid" draw:fill-color="#edf7ff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19" style:family="graphic" style:parent-style-name="standard">
      <style:graphic-properties draw:stroke="solid" svg:stroke-width="0.176cm" svg:stroke-color="#0070c0" draw:marker-end="msArrowEnd_20_5" draw:marker-end-width="0.528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0070c0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35cm" svg:stroke-color="#0070c0" svg:stroke-opacity="0%" draw:fill="solid" draw:fill-color="#0070c0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a878" svg:stroke-opacity="0%" draw:fill="solid" draw:fill-color="#00a878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e2e8f0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35cm" svg:stroke-color="#0070c0" draw:fill="solid" draw:fill-color="#0070c0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35cm" svg:stroke-color="#f7e3a0" draw:fill="solid" draw:fill-color="#fff8e1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27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solid" svg:stroke-width="0.035cm" svg:stroke-color="#e4eaf2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30" style:family="graphic" style:parent-style-name="standard">
      <style:graphic-properties draw:stroke="solid" svg:stroke-width="0.035cm" svg:stroke-color="#cdeadb" draw:fill="solid" draw:fill-color="#eef8f3" draw:auto-grow-heigh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32" style:family="graphic" style:parent-style-name="standard">
      <style:graphic-properties draw:stroke="solid" svg:stroke-width="0.035cm" svg:stroke-color="#0b1f33" draw:fill="solid" draw:fill-color="#0b1f33" draw:auto-grow-heigh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5cm" svg:stroke-color="#eef8f3" draw:marker-start-width="0.223cm" draw:marker-end-width="0.223cm" draw:fill="solid" draw:fill-color="#eef8f3" draw:auto-grow-height="false" fo:min-height="0cm" fo:min-width="0cm" fo:padding-top="0.133cm" fo:padding-bottom="0.133cm" fo:padding-left="0.258cm" fo:padding-right="0.258cm" fo:wrap-option="wrap"/>
    </style:style>
    <style:style style:name="gr34" style:family="graphic" style:parent-style-name="standard">
      <style:graphic-properties draw:stroke="solid" svg:stroke-width="0.018cm" svg:stroke-color="#e6ecf2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5cm" svg:stroke-color="#e6ecf2" draw:marker-start-width="0.248cm" draw:marker-end-width="0.248cm" draw:fill="none" draw:textarea-horizontal-align="center" draw:textarea-vertical-align="middle" draw:auto-grow-height="false" fo:padding-top="0.141cm" fo:padding-bottom="0.141cm" fo:padding-left="0.266cm" fo:padding-right="0.266cm" fo:wrap-option="wrap"/>
    </style:style>
    <style:style style:name="gr36" style:family="graphic" style:parent-style-name="standard">
      <style:graphic-properties draw:stroke="solid" svg:stroke-width="0.035cm" svg:stroke-color="#e3e8ef" draw:fill="solid" draw:fill-color="#f8fafd" draw:auto-grow-heigh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1cm" svg:stroke-color="#e2e8f0" draw:marker-start-width="0.297cm" draw:marker-end-width="0.297cm" draw:fill="solid" draw:fill-color="#ffffff" draw:auto-grow-height="false" fo:min-height="0cm" fo:min-width="0cm" fo:padding-top="0.157cm" fo:padding-bottom="0.157cm" fo:padding-left="0.282cm" fo:padding-right="0.282cm" fo:wrap-option="wrap"/>
    </style:style>
    <style:style style:name="gr38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39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40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4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solid" svg:stroke-width="0.1cm" svg:stroke-color="#e2e8f0" draw:marker-start-width="0.298cm" draw:marker-end-width="0.298cm" draw:fill="solid" draw:fill-color="#ffffff" draw:auto-grow-height="false" fo:min-height="0cm" fo:min-width="0cm" fo:padding-top="0.158cm" fo:padding-bottom="0.158cm" fo:padding-left="0.283cm" fo:padding-right="0.283cm" fo:wrap-option="wrap"/>
    </style:style>
    <style:style style:name="gr43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44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45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47" style:family="graphic" style:parent-style-name="standard">
      <style:graphic-properties draw:stroke="solid" svg:stroke-width="0.035cm" svg:stroke-color="#f4cccc" draw:fill="solid" draw:fill-color="#fff3f2" draw:auto-grow-heigh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49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50" style:family="graphic" style:parent-style-name="standard">
      <style:graphic-properties draw:stroke="solid" svg:stroke-width="0.035cm" svg:stroke-color="#e3e8ef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52" style:family="graphic" style:parent-style-name="standard">
      <style:graphic-properties draw:stroke="solid" svg:stroke-width="0.035cm" svg:stroke-color="#0b1f33" svg:stroke-opacity="0%" draw:fill="solid" draw:fill-color="#0b1f33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tandard-notes">
      <style:graphic-properties draw:stroke="none" svg:stroke-width="0cm" draw:fill="none" draw:fill-color="#ffffff" draw:textarea-vertical-align="top" draw:auto-grow-height="false" fo:min-height="15.239cm" fo:padding-top="0.125cm" fo:padding-bottom="0.125cm" fo:padding-left="0.25cm" fo:padding-right="0.25cm" fo:wrap-option="wrap"/>
    </style:style>
    <style:style style:name="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5.239cm" fo:padding-top="0.125cm" fo:padding-bottom="0.125cm" fo:padding-left="0.25cm" fo:padding-right="0.25cm" fo:wrap-option="wrap"/>
    </style:style>
    <style:style style:name="P1" style:family="paragraph">
      <style:text-properties fo:font-size="18pt"/>
    </style:style>
    <style:style style:name="P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color="#ff6600" fo:font-size="80pt" style:font-size-asian="80pt" style:font-size-complex="80pt"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32pt" fo:font-weight="bold" style:font-size-asian="32pt" style:font-weight-asian="bold" style:font-size-complex="32pt" style:font-weight-complex="bold"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style:font-independent-line-spacing="true"/>
      <style:text-properties fo:font-size="18pt"/>
    </style:style>
    <style:style style:name="P7" style:family="paragraph">
      <style:paragraph-properties style:font-independent-line-spacing="true"/>
      <style:text-properties fo:color="#ffffff" fo:font-size="18pt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hyphenate="false"/>
    </style:style>
    <style:style style:name="P12" style:family="paragraph">
      <style:paragraph-properties style:font-independent-line-spacing="true"/>
      <style:text-properties fo:font-size="26pt" style:font-size-asian="26pt" style:font-size-complex="26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5pt" style:font-size-asian="15pt" style:font-size-complex="15pt" fo:hyphenate="false"/>
    </style:style>
    <style:style style:name="P15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color="#ffffff" fo:font-size="11pt" fo:font-weight="bold" style:font-size-asian="11pt" style:font-weight-asian="bold" style:font-size-complex="11pt" style:font-weight-complex="bold" fo:hyphenate="false"/>
    </style:style>
    <style:style style:name="P16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color="#ffffff" fo:font-size="12pt" fo:font-weight="bold" style:font-size-asian="12pt" style:font-weight-asian="bold" style:font-size-complex="12pt" style:font-weight-complex="bold" fo:hyphenate="false"/>
    </style:style>
    <style:style style:name="P17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26pt" style:font-size-asian="26pt" style:font-size-complex="26pt" fo:hyphenate="false"/>
    </style:style>
    <style:style style:name="P18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19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cm" fo:margin-bottom="0cm" fo:text-align="end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22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3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9pt" style:font-size-asian="9pt" style:font-size-complex="9pt" fo:hyphenate="false"/>
    </style:style>
    <style:style style:name="P24" style:family="paragraph">
      <style:paragraph-properties style:font-independent-line-spacing="true"/>
      <style:text-properties fo:font-size="14pt" style:font-size-asian="14pt" style:font-size-complex="14pt"/>
    </style:style>
    <style:style style:name="P25" style:family="paragraph">
      <style:paragraph-properties style:font-independent-line-spacing="true"/>
      <style:text-properties fo:font-size="9pt" style:font-size-asian="9pt" style:font-size-complex="9pt"/>
    </style:style>
    <style:style style:name="P26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ffffff" fo:font-size="18pt" fo:hyphenate="false"/>
    </style:style>
    <style:style style:name="T1" style:family="text">
      <style:text-properties fo:color="#ff6600" style:text-line-through-style="none" fo:font-family="Aptos" style:font-family-generic="swiss" fo:font-size="80pt" fo:letter-spacing="normal" fo:font-style="normal" style:text-underline-style="none" fo:font-weight="bold" style:font-family-asian="Aptos" style:font-pitch-asian="fixed" style:font-size-asian="80pt" style:font-style-asian="normal" style:font-weight-asian="bold" style:font-family-complex="Aptos" style:font-family-generic-complex="swiss" style:font-size-complex="80pt" style:font-style-complex="normal" style:font-weight-complex="bold"/>
    </style:style>
    <style:style style:name="T2" style:family="text">
      <style:text-properties fo:color="#000000" style:text-line-through-style="none" fo:font-family="'Aptos Display'" style:font-family-generic="swiss" fo:font-size="32pt" fo:letter-spacing="normal" fo:font-style="normal" style:text-underline-style="none" fo:font-weight="bold" style:font-family-asian="'Aptos Display'" style:font-pitch-asian="fixed" style:font-size-asian="32pt" style:font-style-asian="normal" style:font-weight-asian="bold" style:font-family-complex="'Aptos Display'" style:font-family-generic-complex="swiss" style:font-size-complex="32pt" style:font-style-complex="normal" style:font-weight-complex="bold"/>
    </style:style>
    <style:style style:name="T3" style:family="text">
      <style:text-properties fo:color="#000000" style:text-line-through-style="none" fo:font-family="Aptos" style:font-family-generic="swiss" fo:font-size="18pt" fo:letter-spacing="normal" fo:font-style="normal" style:text-underline-style="none" fo:font-weight="normal" style:font-family-asian="Aptos" style:font-pitch-asian="fixed" style:font-size-asian="18pt" style:font-style-asian="normal" style:font-weight-asian="normal" style:font-family-complex="Aptos" style:font-family-generic-complex="swiss" style:font-size-complex="18pt" style:font-style-complex="normal" style:font-weight-complex="normal"/>
    </style:style>
    <style:style style:name="T4" style:family="text">
      <style:text-properties fo:color="#000000" style:text-line-through-style="none" fo:font-family="Aptos" style:font-family-generic="swiss" fo:font-size="22pt" fo:letter-spacing="normal" fo:font-style="normal" style:text-underline-style="none" fo:font-weight="bold" style:font-family-asian="Aptos" style:font-pitch-asian="fixed" style:font-size-asian="22pt" style:font-style-asian="normal" style:font-weight-asian="bold" style:font-family-complex="Aptos" style:font-family-generic-complex="swiss" style:font-size-complex="22pt" style:font-style-complex="normal" style:font-weight-complex="bold"/>
    </style:style>
    <style:style style:name="T5" style:family="text">
      <style:text-properties fo:color="#000000" style:text-line-through-style="none" fo:font-family="Aptos" style:font-family-generic="swiss" fo:font-size="10.5pt" fo:letter-spacing="normal" fo:font-style="normal" style:text-underline-style="none" fo:font-weight="normal" style:font-family-asian="Aptos" style:font-pitch-asian="fixed" style:font-size-asian="10.5pt" style:font-style-asian="normal" style:font-weight-asian="normal" style:font-family-complex="Aptos" style:font-family-generic-complex="swiss" style:font-size-complex="10.5pt" style:font-style-complex="normal" style:font-weight-complex="normal"/>
    </style:style>
    <style:style style:name="T6" style:family="text">
      <style:text-properties fo:color="#ffffff" style:text-line-through-style="none" fo:font-family="Aptos" style:font-family-generic="swiss" fo:font-size="12pt" fo:letter-spacing="normal" fo:font-style="normal" style:text-underline-style="none" fo:font-weight="normal" style:font-family-asian="Aptos" style:font-pitch-asian="fixed" style:font-size-asian="12pt" style:font-style-asian="normal" style:font-weight-asian="normal" style:font-family-complex="Aptos" style:font-family-generic-complex="swiss" style:font-size-complex="12pt" style:font-style-complex="normal" style:font-weight-complex="normal"/>
    </style:style>
    <style:style style:name="T7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8" style:family="text">
      <style:text-properties fo:color="#000000" style:text-line-through-style="none" fo:font-family="Aptos" style:font-family-generic="swiss" fo:font-size="9pt" fo:letter-spacing="normal" fo:font-style="normal" style:text-underline-style="none" fo:font-weight="bold" style:font-family-asian="Aptos" style:font-pitch-asian="fixed" style:font-size-asian="9pt" style:font-style-asian="normal" style:font-weight-asian="bold" style:font-family-complex="Aptos" style:font-family-generic-complex="swiss" style:font-size-complex="9pt" style:font-style-complex="normal" style:font-weight-complex="bold"/>
    </style:style>
    <style:style style:name="T9" style:family="text">
      <style:text-properties fo:color="#000000" style:text-line-through-style="none" fo:font-family="'Aptos Display'" style:font-family-generic="swiss" fo:font-size="26pt" fo:letter-spacing="normal" fo:font-style="normal" style:text-underline-style="none" fo:font-weight="bold" style:font-family-asian="'Aptos Display'" style:font-pitch-asian="fixed" style:font-size-asian="26pt" style:font-style-asian="normal" style:font-weight-asian="bold" style:font-family-complex="'Aptos Display'" style:font-family-generic-complex="swiss" style:font-size-complex="26pt" style:font-style-complex="normal" style:font-weight-complex="bold"/>
    </style:style>
    <style:style style:name="T10" style:family="text">
      <style:text-properties fo:color="#000000" style:text-line-through-style="none" fo:font-family="Aptos" style:font-family-generic="swiss" fo:font-size="15pt" fo:letter-spacing="normal" fo:font-style="normal" style:text-underline-style="none" fo:font-weight="normal" style:font-family-asian="Aptos" style:font-pitch-asian="fixed" style:font-size-asian="15pt" style:font-style-asian="normal" style:font-weight-asian="normal" style:font-family-complex="Aptos" style:font-family-generic-complex="swiss" style:font-size-complex="15pt" style:font-style-complex="normal" style:font-weight-complex="normal"/>
    </style:style>
    <style:style style:name="T11" style:family="text">
      <style:text-properties fo:color="#ffffff" style:text-line-through-style="none" fo:font-family="Aptos" style:font-family-generic="swiss" fo:font-size="11pt" fo:letter-spacing="normal" fo:font-style="normal" style:text-underline-style="none" fo:font-weight="bold" style:font-family-asian="Aptos" style:font-pitch-asian="fixed" style:font-size-asian="11pt" style:font-style-asian="normal" style:font-weight-asian="bold" style:font-family-complex="Aptos" style:font-family-generic-complex="swiss" style:font-size-complex="11pt" style:font-style-complex="normal" style:font-weight-complex="bold"/>
    </style:style>
    <style:style style:name="T12" style:family="text">
      <style:text-properties fo:color="#ffffff" style:text-line-through-style="none" fo:font-family="Aptos" style:font-family-generic="swiss" fo:font-size="12pt" fo:letter-spacing="normal" fo:font-style="normal" style:text-underline-style="none" fo:font-weight="bold" style:font-family-asian="Aptos" style:font-pitch-asian="fixed" style:font-size-asian="12pt" style:font-style-asian="normal" style:font-weight-asian="bold" style:font-family-complex="Aptos" style:font-family-generic-complex="swiss" style:font-size-complex="12pt" style:font-style-complex="normal" style:font-weight-complex="bold"/>
    </style:style>
    <style:style style:name="T13" style:family="text">
      <style:text-properties fo:color="#000000" style:text-line-through-style="none" fo:font-family="Aptos" style:font-family-generic="swiss" fo:font-size="16pt" fo:letter-spacing="normal" fo:font-style="normal" style:text-underline-style="none" fo:font-weight="bold" style:font-family-asian="Aptos" style:font-pitch-asian="fixed" style:font-size-asian="16pt" style:font-style-asian="normal" style:font-weight-asian="bold" style:font-family-complex="Aptos" style:font-family-generic-complex="swiss" style:font-size-complex="16pt" style:font-style-complex="normal" style:font-weight-complex="bold"/>
    </style:style>
    <style:style style:name="T14" style:family="text">
      <style:text-properties fo:color="#000000" style:text-line-through-style="none" fo:font-family="Aptos" style:font-family-generic="swiss" fo:font-size="8.5pt" fo:letter-spacing="normal" fo:font-style="normal" style:text-underline-style="none" fo:font-weight="normal" style:font-family-asian="Aptos" style:font-pitch-asian="fixed" style:font-size-asian="8.5pt" style:font-style-asian="normal" style:font-weight-asian="normal" style:font-family-complex="Aptos" style:font-family-generic-complex="swiss" style:font-size-complex="8.5pt" style:font-style-complex="normal" style:font-weight-complex="normal"/>
    </style:style>
    <style:style style:name="T15" style:family="text">
      <style:text-properties fo:color="#000000" style:text-line-through-style="none" fo:font-family="Aptos" style:font-family-generic="swiss" fo:font-size="16pt" fo:letter-spacing="normal" fo:font-style="normal" style:text-underline-style="none" fo:font-weight="normal" style:font-family-asian="Aptos" style:font-pitch-asian="fixed" style:font-size-asian="16pt" style:font-style-asian="normal" style:font-weight-asian="normal" style:font-family-complex="Aptos" style:font-family-generic-complex="swiss" style:font-size-complex="16pt" style:font-style-complex="normal" style:font-weight-complex="normal"/>
    </style:style>
    <style:style style:name="T16" style:family="text">
      <style:text-properties fo:color="#000000" style:text-line-through-style="none" fo:font-family="Aptos" style:font-family-generic="swiss" fo:font-size="9.5pt" fo:letter-spacing="normal" fo:font-style="normal" style:text-underline-style="none" fo:font-weight="normal" style:font-family-asian="Aptos" style:font-pitch-asian="fixed" style:font-size-asian="9.5pt" style:font-style-asian="normal" style:font-weight-asian="normal" style:font-family-complex="Aptos" style:font-family-generic-complex="swiss" style:font-size-complex="9.5pt" style:font-style-complex="normal" style:font-weight-complex="normal"/>
    </style:style>
    <style:style style:name="T17" style:family="text">
      <style:text-properties fo:color="#000000" style:text-line-through-style="none" fo:font-family="Aptos" style:font-family-generic="swiss" fo:font-size="12pt" fo:letter-spacing="normal" fo:font-style="normal" style:text-underline-style="none" fo:font-weight="bold" style:font-family-asian="Aptos" style:font-pitch-asian="fixed" style:font-size-asian="12pt" style:font-style-asian="normal" style:font-weight-asian="bold" style:font-family-complex="Aptos" style:font-family-generic-complex="swiss" style:font-size-complex="12pt" style:font-style-complex="normal" style:font-weight-complex="bold"/>
    </style:style>
    <style:style style:name="T18" style:family="text">
      <style:text-properties fo:color="#000000" style:text-line-through-style="none" fo:font-family="Aptos" style:font-family-generic="swiss" fo:font-size="15pt" fo:letter-spacing="normal" fo:font-style="normal" style:text-underline-style="none" fo:font-weight="bold" style:font-family-asian="Aptos" style:font-pitch-asian="fixed" style:font-size-asian="15pt" style:font-style-asian="normal" style:font-weight-asian="bold" style:font-family-complex="Aptos" style:font-family-generic-complex="swiss" style:font-size-complex="15pt" style:font-style-complex="normal" style:font-weight-complex="bold"/>
    </style:style>
    <style:style style:name="T19" style:family="text">
      <style:text-properties fo:color="#000000" style:text-line-through-style="none" fo:font-family="Aptos" style:font-family-generic="swiss" fo:font-size="11.5pt" fo:letter-spacing="normal" fo:font-style="normal" style:text-underline-style="none" fo:font-weight="normal" style:font-family-asian="Aptos" style:font-pitch-asian="fixed" style:font-size-asian="11.5pt" style:font-style-asian="normal" style:font-weight-asian="normal" style:font-family-complex="Aptos" style:font-family-generic-complex="swiss" style:font-size-complex="11.5pt" style:font-style-complex="normal" style:font-weight-complex="normal"/>
    </style:style>
    <style:style style:name="T20" style:family="text">
      <style:text-properties fo:color="#000000" style:text-line-through-style="none" fo:font-family="Aptos" style:font-family-generic="swiss" fo:font-size="14pt" fo:letter-spacing="normal" fo:font-style="normal" style:text-underline-style="none" fo:font-weight="normal" style:font-family-asian="Aptos" style:font-pitch-asian="fixed" style:font-size-asian="14pt" style:font-style-asian="normal" style:font-weight-asian="normal" style:font-family-complex="Aptos" style:font-family-generic-complex="swiss" style:font-size-complex="14pt" style:font-style-complex="normal" style:font-weight-complex="normal"/>
    </style:style>
    <style:style style:name="T21" style:family="text">
      <style:text-properties fo:color="#000000" style:text-line-through-style="none" fo:font-family="Aptos" style:font-family-generic="swiss" fo:font-size="13.5pt" fo:letter-spacing="normal" fo:font-style="normal" style:text-underline-style="none" fo:font-weight="normal" style:font-family-asian="Aptos" style:font-pitch-asian="fixed" style:font-size-asian="13.5pt" style:font-style-asian="normal" style:font-weight-asian="normal" style:font-family-complex="Aptos" style:font-family-generic-complex="swiss" style:font-size-complex="13.5pt" style:font-style-complex="normal" style:font-weight-complex="normal"/>
    </style:style>
    <style:style style:name="T22" style:family="text">
      <style:text-properties fo:color="#000000" style:text-line-through-style="none" fo:font-family="Aptos" style:font-family-generic="swiss" fo:font-size="18pt" fo:letter-spacing="normal" fo:font-style="normal" style:text-underline-style="none" fo:font-weight="bold" style:font-family-asian="Aptos" style:font-pitch-asian="fixed" style:font-size-asian="18pt" style:font-style-asian="normal" style:font-weight-asian="bold" style:font-family-complex="Aptos" style:font-family-generic-complex="swiss" style:font-size-complex="18pt" style:font-style-complex="normal" style:font-weight-complex="bold"/>
    </style:style>
    <style:style style:name="T23" style:family="text">
      <style:text-properties fo:color="#000000" style:text-line-through-style="none" fo:font-family="Aptos" style:font-family-generic="swiss" fo:font-size="14.5pt" fo:letter-spacing="normal" fo:font-style="normal" style:text-underline-style="none" fo:font-weight="normal" style:font-family-asian="Aptos" style:font-pitch-asian="fixed" style:font-size-asian="14.5pt" style:font-style-asian="normal" style:font-weight-asian="normal" style:font-family-complex="Aptos" style:font-family-generic-complex="swiss" style:font-size-complex="14.5pt" style:font-style-complex="normal" style:font-weight-complex="normal"/>
    </style:style>
    <style:style style:name="T24" style:family="text">
      <style:text-properties fo:color="#000000" style:text-line-through-style="none" fo:font-family="Aptos" style:font-family-generic="swiss" fo:font-size="10.5pt" fo:letter-spacing="normal" fo:font-style="normal" style:text-underline-style="none" fo:font-weight="bold" style:font-family-asian="Aptos" style:font-pitch-asian="fixed" style:font-size-asian="10.5pt" style:font-style-asian="normal" style:font-weight-asian="bold" style:font-family-complex="Aptos" style:font-family-generic-complex="swiss" style:font-size-complex="10.5pt" style:font-style-complex="normal" style:font-weight-complex="bold"/>
    </style:style>
    <style:style style:name="T25" style:family="text">
      <style:text-properties fo:color="#000000" style:text-line-through-style="none" fo:font-family="Aptos" style:font-family-generic="swiss" fo:font-size="14.1999998092651pt" fo:letter-spacing="normal" fo:font-style="normal" style:text-underline-style="none" fo:font-weight="normal" style:font-family-asian="Aptos" style:font-pitch-asian="fixed" style:font-size-asian="14.1999998092651pt" style:font-style-asian="normal" style:font-weight-asian="normal" style:font-family-complex="Aptos" style:font-family-generic-complex="swiss" style:font-size-complex="14.1999998092651pt" style:font-style-complex="normal" style:font-weight-complex="normal"/>
    </style:style>
    <style:style style:name="T26" style:family="text">
      <style:text-properties fo:color="#000000" style:text-line-through-style="none" fo:font-family="Aptos" style:font-family-generic="swiss" fo:font-size="14pt" fo:letter-spacing="normal" fo:font-style="normal" style:text-underline-style="none" fo:font-weight="bold" style:font-family-asian="Aptos" style:font-pitch-asian="fixed" style:font-size-asian="14pt" style:font-style-asian="normal" style:font-weight-asian="bold" style:font-family-complex="Aptos" style:font-family-generic-complex="swiss" style:font-size-complex="14pt" style:font-style-complex="normal" style:font-weight-complex="bold"/>
    </style:style>
    <style:style style:name="T27" style:family="text">
      <style:text-properties fo:color="#000000" style:text-line-through-style="none" fo:font-family="Aptos" style:font-family-generic="swiss" fo:font-size="12.8000001907349pt" fo:letter-spacing="normal" fo:font-style="normal" style:text-underline-style="none" fo:font-weight="normal" style:font-family-asian="Aptos" style:font-pitch-asian="fixed" style:font-size-asian="12.8000001907349pt" style:font-style-asian="normal" style:font-weight-asian="normal" style:font-family-complex="Aptos" style:font-family-generic-complex="swiss" style:font-size-complex="12.8000001907349pt" style:font-style-complex="normal" style:font-weight-complex="normal"/>
    </style:style>
    <style:style style:name="T28" style:family="text">
      <style:text-properties fo:color="#000000" style:text-line-through-style="none" fo:font-family="Aptos" style:font-family-generic="swiss" fo:font-size="17pt" fo:letter-spacing="normal" fo:font-style="normal" style:text-underline-style="none" fo:font-weight="bold" style:font-family-asian="Aptos" style:font-pitch-asian="fixed" style:font-size-asian="17pt" style:font-style-asian="normal" style:font-weight-asian="bold" style:font-family-complex="Aptos" style:font-family-generic-complex="swiss" style:font-size-complex="17pt" style:font-style-complex="normal" style:font-weight-complex="bold"/>
    </style:style>
    <style:style style:name="T29" style:family="text">
      <style:text-properties fo:color="#000000" style:text-line-through-style="none" fo:font-family="Aptos" style:font-family-generic="swiss" fo:font-size="14.5pt" fo:letter-spacing="normal" fo:font-style="normal" style:text-underline-style="none" fo:font-weight="bold" style:font-family-asian="Aptos" style:font-pitch-asian="fixed" style:font-size-asian="14.5pt" style:font-style-asian="normal" style:font-weight-asian="bold" style:font-family-complex="Aptos" style:font-family-generic-complex="swiss" style:font-size-complex="14.5pt" style:font-style-complex="normal" style:font-weight-complex="bold"/>
    </style:style>
    <style:style style:name="T30" style:family="text">
      <style:text-properties fo:color="#000000" style:text-line-through-style="none" fo:font-family="Aptos" style:font-family-generic="swiss" fo:font-size="12pt" fo:letter-spacing="normal" fo:font-style="normal" style:text-underline-style="none" fo:font-weight="normal" style:font-family-asian="Aptos" style:font-pitch-asian="fixed" style:font-size-asian="12pt" style:font-style-asian="normal" style:font-weight-asian="normal" style:font-family-complex="Aptos" style:font-family-generic-complex="swiss" style:font-size-complex="12pt" style:font-style-complex="normal" style:font-weight-complex="normal"/>
    </style:style>
    <style:style style:name="T31" style:family="text">
      <style:text-properties fo:color="#000000" style:text-line-through-style="none" fo:font-family="Aptos" style:font-family-generic="swiss" fo:font-size="9pt" fo:letter-spacing="normal" fo:font-style="normal" style:text-underline-style="none" fo:font-weight="normal" style:font-family-asian="Aptos" style:font-pitch-asian="fixed" style:font-size-asian="9pt" style:font-style-asian="normal" style:font-weight-asian="normal" style:font-family-complex="Aptos" style:font-family-generic-complex="swiss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422cm"/>
        <style:text-properties fo:font-family="StarSymbol" fo:color="#15223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4c43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d7e6f6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b1f33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152238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 1" draw:style-name="dp1" draw:master-page-name="Standard" presentation:presentation-page-layout-name="AL1T0">
        <office:forms form:automatic-focus="false" form:apply-design-mode="false"/>
        <draw:custom-shape draw:name="Shape 0" draw:style-name="gr1" draw:text-style-name="P1" draw:layer="layout" svg:width="32.908cm" svg:height="1.486cm" svg:x="0.958cm" svg:y="17.563cm">
          <text:p/>
          <draw:enhanced-geometry svg:viewBox="0 0 21600 21600" draw:type="rectangle" draw:enhanced-path="M 0 0 L 21600 0 21600 21600 0 21600 0 0 Z N"/>
        </draw:custom-shape>
        <draw:custom-shape draw:name="Shape 0" draw:style-name="gr2" draw:text-style-name="P1" draw:layer="layout" svg:width="0.958cm" svg:height="19.049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3" draw:text-style-name="P3" draw:layer="layout" svg:width="1.89cm" svg:height="2.946cm" svg:x="3.738cm" svg:y="2.999cm">
          <text:p text:style-name="P2"><text:span text:style-name="T1">⚡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2" draw:style-name="gr4" draw:text-style-name="P4" draw:layer="layout" svg:width="27.064cm" svg:height="4.19cm" svg:x="3.683cm" svg:y="3.683cm">
          <text:p text:style-name="P2"><text:span text:style-name="T2">Stromverbrauch- Vorhersage Deutschland</text:span></text:p>
          <draw:enhanced-geometry svg:viewBox="0 0 21600 21600" draw:type="rectangle" draw:enhanced-path="M 0 0 L 21600 0 21600 21600 0 21600 0 0 Z N"/>
        </draw:custom-shape>
        <draw:custom-shape draw:name="Text 3" draw:style-name="gr5" draw:text-style-name="P5" draw:layer="layout" svg:width="26.554cm" svg:height="0.964cm" svg:x="3.759cm" svg:y="8.255cm">
          <text:p text:style-name="P2"><text:span text:style-name="T3">Machine Learning für stündliche Netzlast-Prognosen · Wetter · Kalender · SMARD-Vergleich</text:span></text:p>
          <draw:enhanced-geometry svg:viewBox="0 0 21600 21600" draw:type="rectangle" draw:enhanced-path="M 0 0 L 21600 0 21600 21600 0 21600 0 0 Z N"/>
        </draw:custom-shape>
        <draw:custom-shape draw:name="Shape 4" draw:style-name="gr6" draw:text-style-name="P1" draw:layer="layout" svg:width="6.73cm" svg:height="2.666cm" svg:x="3.683cm" svg:y="10.7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5" draw:style-name="gr7" draw:text-style-name="P1" draw:layer="layout" svg:width="0.202cm" svg:height="2.666cm" svg:x="3.683cm" svg:y="10.795cm">
          <text:p/>
          <draw:enhanced-geometry svg:viewBox="0 0 21600 21600" draw:type="rectangle" draw:enhanced-path="M 0 0 L 21600 0 21600 21600 0 21600 0 0 Z N"/>
        </draw:custom-shape>
        <draw:custom-shape draw:name="Text 6" draw:style-name="gr4" draw:text-style-name="P6" draw:layer="layout" svg:width="5.841cm" svg:height="0.863cm" svg:x="4.318cm" svg:y="11.252cm">
          <text:p text:style-name="P2"><text:span text:style-name="T4">2019–24 / 2025</text:span></text:p>
          <draw:enhanced-geometry svg:viewBox="0 0 21600 21600" draw:type="rectangle" draw:enhanced-path="M 0 0 L 21600 0 21600 21600 0 21600 0 0 Z N"/>
        </draw:custom-shape>
        <draw:custom-shape draw:name="Text 7" draw:style-name="gr4" draw:text-style-name="P6" draw:layer="layout" svg:width="5.841cm" svg:height="0.71cm" svg:x="4.318cm" svg:y="12.268cm">
          <text:p text:style-name="P2"><text:span text:style-name="T5">Train/Test Split</text:span></text:p>
          <draw:enhanced-geometry svg:viewBox="0 0 21600 21600" draw:type="rectangle" draw:enhanced-path="M 0 0 L 21600 0 21600 21600 0 21600 0 0 Z N"/>
        </draw:custom-shape>
        <draw:custom-shape draw:name="Shape 8" draw:style-name="gr6" draw:text-style-name="P1" draw:layer="layout" svg:width="5.46cm" svg:height="2.666cm" svg:x="11.049cm" svg:y="10.7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9" draw:style-name="gr2" draw:text-style-name="P1" draw:layer="layout" svg:width="0.202cm" svg:height="2.666cm" svg:x="11.049cm" svg:y="10.795cm">
          <text:p/>
          <draw:enhanced-geometry svg:viewBox="0 0 21600 21600" draw:type="rectangle" draw:enhanced-path="M 0 0 L 21600 0 21600 21600 0 21600 0 0 Z N"/>
        </draw:custom-shape>
        <draw:custom-shape draw:name="Text 10" draw:style-name="gr4" draw:text-style-name="P6" draw:layer="layout" svg:width="4.571cm" svg:height="0.863cm" svg:x="11.684cm" svg:y="11.252cm">
          <text:p text:style-name="P2"><text:span text:style-name="T4">SMARD API</text:span></text:p>
          <draw:enhanced-geometry svg:viewBox="0 0 21600 21600" draw:type="rectangle" draw:enhanced-path="M 0 0 L 21600 0 21600 21600 0 21600 0 0 Z N"/>
        </draw:custom-shape>
        <draw:custom-shape draw:name="Text 11" draw:style-name="gr4" draw:text-style-name="P6" draw:layer="layout" svg:width="4.571cm" svg:height="0.71cm" svg:x="11.684cm" svg:y="12.268cm">
          <text:p text:style-name="P2"><text:span text:style-name="T5">Aktualisierung</text:span></text:p>
          <draw:enhanced-geometry svg:viewBox="0 0 21600 21600" draw:type="rectangle" draw:enhanced-path="M 0 0 L 21600 0 21600 21600 0 21600 0 0 Z N"/>
        </draw:custom-shape>
        <draw:custom-shape draw:name="Shape 12" draw:style-name="gr6" draw:text-style-name="P1" draw:layer="layout" svg:width="6.462cm" svg:height="2.666cm" svg:x="17.145cm" svg:y="10.7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3" draw:style-name="gr8" draw:text-style-name="P1" draw:layer="layout" svg:width="0.202cm" svg:height="2.666cm" svg:x="17.145cm" svg:y="10.795cm">
          <text:p/>
          <draw:enhanced-geometry svg:viewBox="0 0 21600 21600" draw:type="rectangle" draw:enhanced-path="M 0 0 L 21600 0 21600 21600 0 21600 0 0 Z N"/>
        </draw:custom-shape>
        <draw:custom-shape draw:name="Text 14" draw:style-name="gr9" draw:text-style-name="P5" draw:layer="layout" svg:width="6.922cm" svg:height="0.863cm" svg:x="17.78cm" svg:y="11.252cm">
          <text:p text:style-name="P2"><text:span text:style-name="T4">Streamlit App</text:span></text:p>
          <draw:enhanced-geometry svg:viewBox="0 0 21600 21600" draw:type="rectangle" draw:enhanced-path="M 0 0 L 21600 0 21600 21600 0 21600 0 0 Z N"/>
        </draw:custom-shape>
        <draw:custom-shape draw:name="Text 15" draw:style-name="gr4" draw:text-style-name="P6" draw:layer="layout" svg:width="5.079cm" svg:height="0.71cm" svg:x="17.78cm" svg:y="12.268cm">
          <text:p text:style-name="P2"><text:span text:style-name="T5">Output</text:span></text:p>
          <draw:enhanced-geometry svg:viewBox="0 0 21600 21600" draw:type="rectangle" draw:enhanced-path="M 0 0 L 21600 0 21600 21600 0 21600 0 0 Z N"/>
        </draw:custom-shape>
        <draw:custom-shape draw:name="Text 16" draw:style-name="gr4" draw:text-style-name="P7" draw:layer="layout" svg:width="10.667cm" svg:height="0.761cm" svg:x="3.759cm" svg:y="17.967cm">
          <text:p text:style-name="P2"><text:span text:style-name="T6">Yuchuan Liu · Mai 2026 · Portfolio-Projek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0" draw:layer="layout" svg:width="15.239cm" svg:height="8.572cm" svg:x="1.905cm" svg:y="3.175cm" draw:page-number="1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mer&gt;</text:page-number></text:span></text:p>
            </draw:text-box>
          </draw:frame>
        </presentation:notes>
      </draw:page>
      <draw:page draw:name="Slide 2" draw:style-name="dp3" draw:master-page-name="Standard">
        <office:forms form:automatic-focus="false" form:apply-design-mode="false"/>
        <draw:custom-shape draw:style-name="gr11" draw:text-style-name="P10" draw:layer="layout" svg:width="4.744cm" svg:height="4.379cm" svg:x="2.532cm" svg:y="5.292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name="Shape 0" draw:style-name="gr7" draw:text-style-name="P1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4" draw:text-style-name="P6" draw:layer="layout" svg:width="6.476cm" svg:height="0.609cm" svg:x="25.527cm" svg:y="0.813cm">
          <text:p text:style-name="P11"><text:span text:style-name="T8">STORYLINE</text:span></text:p>
          <draw:enhanced-geometry svg:viewBox="0 0 21600 21600" draw:type="rectangle" draw:enhanced-path="M 0 0 L 21600 0 21600 21600 0 21600 0 0 Z N"/>
        </draw:custom-shape>
        <draw:custom-shape draw:name="Text 2" draw:style-name="gr4" draw:text-style-name="P12" draw:layer="layout" svg:width="23.494cm" svg:height="1.421cm" svg:x="1.524cm" svg:y="1.067cm">
          <text:p text:style-name="P2"><text:span text:style-name="T9">Projektziel: belastbare 24h-Lastprognose</text:span></text:p>
          <draw:enhanced-geometry svg:viewBox="0 0 21600 21600" draw:type="rectangle" draw:enhanced-path="M 0 0 L 21600 0 21600 21600 0 21600 0 0 Z N"/>
        </draw:custom-shape>
        <draw:line draw:name="Shape 3" draw:style-name="gr12" draw:text-style-name="P13" draw:layer="layout" svg:x1="1.524cm" svg:y1="2.59cm" svg:x2="32.131cm" svg:y2="2.59cm">
          <text:p/>
        </draw:line>
        <draw:custom-shape draw:name="Text 4" draw:style-name="gr13" draw:text-style-name="P14" draw:layer="layout" svg:width="30.386cm" svg:height="1.396cm" svg:x="1.524cm" svg:y="3.099cm">
          <text:p text:style-name="P2"><text:span text:style-name="T10">Ziel ist nicht nur ein hoher R²-Wert, sondern eine Prognose, die im Tagesbetrieb interpretierbar und mit offiziellen SMARD-Werten vergleichbar ist.</text:span></text:p>
          <draw:enhanced-geometry svg:viewBox="0 0 21600 21600" draw:type="rectangle" draw:enhanced-path="M 0 0 L 21600 0 21600 21600 0 21600 0 0 Z N"/>
        </draw:custom-shape>
        <draw:custom-shape draw:name="Text 6" draw:style-name="gr4" draw:text-style-name="P15" draw:layer="layout" svg:width="3.936cm" svg:height="2.481cm" svg:x="2.887cm" svg:y="6.049cm">
          <text:p text:style-name="P2"><text:span text:style-name="T11">1 <text:s/>Datenbasis</text:span></text:p>
          <text:p text:style-name="P2"><text:span text:style-name="T11"/></text:p>
          <text:p text:style-name="P2"><text:span text:style-name="T11">Kaggle</text:span></text:p>
          <text:p text:style-name="P2"><text:span text:style-name="T11">Open-Meteo SMARD</text:span></text:p>
          <draw:enhanced-geometry svg:viewBox="0 0 21600 21600" draw:type="rectangle" draw:enhanced-path="M 0 0 L 21600 0 21600 21600 0 21600 0 0 Z N"/>
        </draw:custom-shape>
        <draw:custom-shape draw:name="Shape 8" draw:style-name="gr14" draw:text-style-name="P1" draw:layer="layout" svg:width="4.712cm" svg:height="4.424cm" svg:x="7.149cm" svg:y="5.292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name="Text 9" draw:style-name="gr4" draw:text-style-name="P16" draw:layer="layout" svg:width="3.936cm" svg:height="2.414cm" svg:x="8.544cm" svg:y="6.171cm">
          <text:p text:style-name="P2"><text:span text:style-name="T12">2 <text:s/>Features</text:span></text:p>
          <text:p text:style-name="P2"><text:span text:style-name="T12"/></text:p>
          <text:p text:style-name="P2"><text:span text:style-name="T12">Lag- und </text:span></text:p>
          <text:p text:style-name="P2"><text:span text:style-name="T12">Rolling-</text:span></text:p>
          <text:p text:style-name="P2"><text:span text:style-name="T12">Features</text:span></text:p>
          <draw:enhanced-geometry svg:viewBox="0 0 21600 21600" draw:type="rectangle" draw:enhanced-path="M 0 0 L 21600 0 21600 21600 0 21600 0 0 Z N"/>
        </draw:custom-shape>
        <draw:custom-shape draw:name="Shape 11" draw:style-name="gr15" draw:text-style-name="P1" draw:layer="layout" svg:width="4.469cm" svg:height="4.393cm" svg:x="11.973cm" svg:y="5.292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name="Text 12" draw:style-name="gr4" draw:text-style-name="P16" draw:layer="layout" svg:width="3.097cm" svg:height="2.368cm" draw:transform="skewX (-0.0324631240870884) translate (13.125cm 6.171cm)">
          <text:p text:style-name="P2"><text:span text:style-name="T12">3 <text:s/>Modelle</text:span></text:p>
          <text:p text:style-name="P2"><text:span text:style-name="T12"/></text:p>
          <text:p text:style-name="P2"><text:span text:style-name="T12">RandomForest</text:span></text:p>
          <text:p text:style-name="P2"><text:span text:style-name="T12">XGBoost</text:span></text:p>
          <text:p text:style-name="P2"><text:span text:style-name="T12">LightGBM</text:span></text:p>
          <draw:enhanced-geometry svg:viewBox="0 0 21600 21600" draw:type="rectangle" draw:enhanced-path="M 0 0 L 21600 0 21600 21600 0 21600 0 0 Z N"/>
        </draw:custom-shape>
        <draw:custom-shape draw:name="Shape 14" draw:style-name="gr16" draw:text-style-name="P1" draw:layer="layout" svg:width="4.264cm" svg:height="4.393cm" svg:x="16.524cm" svg:y="5.34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name="Text 15" draw:style-name="gr4" draw:text-style-name="P16" draw:layer="layout" svg:width="3.936cm" svg:height="2.459cm" svg:x="17.683cm" svg:y="6.171cm">
          <text:p text:style-name="P2"><text:span text:style-name="T12">4 <text:s/>Nutzung</text:span></text:p>
          <text:p text:style-name="P2"><text:span text:style-name="T12"/></text:p>
          <text:p text:style-name="P2"><text:span text:style-name="T12">Streamlit GUI</text:span></text:p>
          <text:p text:style-name="P2"><text:span text:style-name="T12">SMARD-</text:span></text:p>
          <text:p text:style-name="P2"><text:span text:style-name="T12"><text:s text:c="2"/></text:span><text:span text:style-name="T12">Vergleich</text:span></text:p>
          <draw:enhanced-geometry svg:viewBox="0 0 21600 21600" draw:type="rectangle" draw:enhanced-path="M 0 0 L 21600 0 21600 21600 0 21600 0 0 Z N"/>
        </draw:custom-shape>
        <draw:custom-shape draw:name="Shape 17" draw:style-name="gr17" draw:text-style-name="P1" draw:layer="layout" svg:width="29.463cm" svg:height="4.444cm" svg:x="2.184cm" svg:y="10.7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18" draw:style-name="gr4" draw:text-style-name="P6" draw:layer="layout" svg:width="8.127cm" svg:height="0.761cm" svg:x="2.921cm" svg:y="11.303cm">
          <text:p text:style-name="P2"><text:span text:style-name="T13">Rekursive ML Ablauf</text:span></text:p>
          <draw:enhanced-geometry svg:viewBox="0 0 21600 21600" draw:type="rectangle" draw:enhanced-path="M 0 0 L 21600 0 21600 21600 0 21600 0 0 Z N"/>
        </draw:custom-shape>
        <draw:custom-shape draw:name="Text 19" draw:style-name="gr4" draw:text-style-name="P6" draw:layer="layout" svg:width="26.669cm" svg:height="2.158cm" svg:x="2.794cm" svg:y="12.319cm">
          <text:list text:style-name="L3">
            <text:list-item>
              <text:p text:style-name="P2"><text:span text:style-name="T10">Von Problem → Daten → Features → Modell → Anwendung </text:span></text:p>
            </text:list-item>
            <text:list-item>
              <text:p text:style-name="P2"><text:span text:style-name="T10">MAE/RMSE und Fehlerbilder stärker betonen als nur R²</text:span></text:p>
            </text:list-item>
            <text:list-item>
              <text:p text:style-name="P2"><text:span text:style-name="T10">Feiertage/Brückentage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 20" draw:style-name="gr4" draw:text-style-name="P6" draw:layer="layout" svg:width="17.779cm" svg:height="0.558cm" svg:x="1.524cm" svg:y="18.136cm">
          <text:p text:style-name="P2"><text:span text:style-name="T14">electricity_demand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21" draw:style-name="gr4" draw:text-style-name="P6" draw:layer="layout" svg:width="1.269cm" svg:height="0.558cm" svg:x="31.115cm" svg:y="18.136cm">
          <text:p text:style-name="P11"><text:span text:style-name="T14">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0" draw:layer="layout" svg:width="15.239cm" svg:height="8.572cm" svg:x="1.905cm" svg:y="3.175cm" draw:page-number="2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mer&gt;</text:page-number></text:span></text:p>
            </draw:text-box>
          </draw:frame>
        </presentation:notes>
      </draw:page>
      <draw:page draw:name="Slide 3" draw:style-name="dp3" draw:master-page-name="Standard">
        <office:forms form:automatic-focus="false" form:apply-design-mode="false"/>
        <draw:custom-shape draw:name="Shape 0" draw:style-name="gr7" draw:text-style-name="P1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4" draw:text-style-name="P6" draw:layer="layout" svg:width="6.476cm" svg:height="0.609cm" svg:x="25.527cm" svg:y="0.813cm">
          <text:p text:style-name="P11"><text:span text:style-name="T8">DATEN</text:span></text:p>
          <draw:enhanced-geometry svg:viewBox="0 0 21600 21600" draw:type="rectangle" draw:enhanced-path="M 0 0 L 21600 0 21600 21600 0 21600 0 0 Z N"/>
        </draw:custom-shape>
        <draw:custom-shape draw:name="Text 2" draw:style-name="gr18" draw:text-style-name="P17" draw:layer="layout" svg:width="28.744cm" svg:height="1.421cm" svg:x="1.524cm" svg:y="1.067cm">
          <text:p text:style-name="P2"><text:span text:style-name="T9">Datenbasis: historische Last + Wetter + Kalender</text:span></text:p>
          <draw:enhanced-geometry svg:viewBox="0 0 21600 21600" draw:type="rectangle" draw:enhanced-path="M 0 0 L 21600 0 21600 21600 0 21600 0 0 Z N"/>
        </draw:custom-shape>
        <draw:line draw:name="Shape 3" draw:style-name="gr12" draw:text-style-name="P13" draw:layer="layout" svg:x1="1.524cm" svg:y1="2.59cm" svg:x2="32.131cm" svg:y2="2.59cm">
          <text:p/>
        </draw:line>
        <draw:custom-shape draw:name="Text 4" draw:style-name="gr4" draw:text-style-name="P18" draw:layer="layout" svg:width="30.477cm" svg:height="1.066cm" svg:x="1.524cm" svg:y="3.099cm">
          <text:p text:style-name="P2"><text:span text:style-name="T15">Die Prognose kombiniert langfristige Verbrauchsmuster mit kurzfristigen Wetter- und Kalendereffekten.</text:span></text:p>
          <draw:enhanced-geometry svg:viewBox="0 0 21600 21600" draw:type="rectangle" draw:enhanced-path="M 0 0 L 21600 0 21600 21600 0 21600 0 0 Z N"/>
        </draw:custom-shape>
        <draw:line draw:name="Shape 5" draw:style-name="gr19" draw:text-style-name="P13" draw:layer="layout" svg:x1="2.159cm" svg:y1="6.223cm" svg:x2="21.971cm" svg:y2="6.223cm">
          <text:p/>
        </draw:line>
        <draw:custom-shape draw:name="Shape 6" draw:style-name="gr20" draw:text-style-name="P1" draw:layer="layout" svg:width="0.304cm" svg:height="0.304cm" svg:x="2.007cm" svg:y="6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7" draw:style-name="gr4" draw:text-style-name="P6" draw:layer="layout" svg:width="1.117cm" svg:height="0.558cm" svg:x="1.6cm" svg:y="6.731cm">
          <text:p text:style-name="P19"><text:span text:style-name="T16">2019</text:span></text:p>
          <draw:enhanced-geometry svg:viewBox="0 0 21600 21600" draw:type="rectangle" draw:enhanced-path="M 0 0 L 21600 0 21600 21600 0 21600 0 0 Z N"/>
        </draw:custom-shape>
        <draw:custom-shape draw:name="Shape 8" draw:style-name="gr20" draw:text-style-name="P1" draw:layer="layout" svg:width="0.304cm" svg:height="0.304cm" svg:x="5.309cm" svg:y="6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9" draw:style-name="gr4" draw:text-style-name="P6" draw:layer="layout" svg:width="1.117cm" svg:height="0.558cm" svg:x="4.902cm" svg:y="6.731cm">
          <text:p text:style-name="P19"><text:span text:style-name="T16">2020</text:span></text:p>
          <draw:enhanced-geometry svg:viewBox="0 0 21600 21600" draw:type="rectangle" draw:enhanced-path="M 0 0 L 21600 0 21600 21600 0 21600 0 0 Z N"/>
        </draw:custom-shape>
        <draw:custom-shape draw:name="Shape 10" draw:style-name="gr20" draw:text-style-name="P1" draw:layer="layout" svg:width="0.304cm" svg:height="0.304cm" svg:x="8.611cm" svg:y="6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11" draw:style-name="gr4" draw:text-style-name="P6" draw:layer="layout" svg:width="1.117cm" svg:height="0.558cm" svg:x="8.204cm" svg:y="6.731cm">
          <text:p text:style-name="P19"><text:span text:style-name="T16">2021</text:span></text:p>
          <draw:enhanced-geometry svg:viewBox="0 0 21600 21600" draw:type="rectangle" draw:enhanced-path="M 0 0 L 21600 0 21600 21600 0 21600 0 0 Z N"/>
        </draw:custom-shape>
        <draw:custom-shape draw:name="Shape 12" draw:style-name="gr20" draw:text-style-name="P1" draw:layer="layout" svg:width="0.304cm" svg:height="0.304cm" svg:x="11.913cm" svg:y="6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13" draw:style-name="gr4" draw:text-style-name="P6" draw:layer="layout" svg:width="1.117cm" svg:height="0.558cm" svg:x="11.506cm" svg:y="6.731cm">
          <text:p text:style-name="P19"><text:span text:style-name="T16">2022</text:span></text:p>
          <draw:enhanced-geometry svg:viewBox="0 0 21600 21600" draw:type="rectangle" draw:enhanced-path="M 0 0 L 21600 0 21600 21600 0 21600 0 0 Z N"/>
        </draw:custom-shape>
        <draw:custom-shape draw:name="Shape 14" draw:style-name="gr20" draw:text-style-name="P1" draw:layer="layout" svg:width="0.304cm" svg:height="0.304cm" svg:x="15.215cm" svg:y="6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15" draw:style-name="gr4" draw:text-style-name="P6" draw:layer="layout" svg:width="1.117cm" svg:height="0.558cm" svg:x="14.808cm" svg:y="6.731cm">
          <text:p text:style-name="P19"><text:span text:style-name="T16">2023</text:span></text:p>
          <draw:enhanced-geometry svg:viewBox="0 0 21600 21600" draw:type="rectangle" draw:enhanced-path="M 0 0 L 21600 0 21600 21600 0 21600 0 0 Z N"/>
        </draw:custom-shape>
        <draw:custom-shape draw:name="Shape 16" draw:style-name="gr20" draw:text-style-name="P1" draw:layer="layout" svg:width="0.304cm" svg:height="0.304cm" svg:x="18.517cm" svg:y="6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17" draw:style-name="gr4" draw:text-style-name="P6" draw:layer="layout" svg:width="1.117cm" svg:height="0.558cm" svg:x="18.11cm" svg:y="6.731cm">
          <text:p text:style-name="P19"><text:span text:style-name="T16">2024</text:span></text:p>
          <draw:enhanced-geometry svg:viewBox="0 0 21600 21600" draw:type="rectangle" draw:enhanced-path="M 0 0 L 21600 0 21600 21600 0 21600 0 0 Z N"/>
        </draw:custom-shape>
        <draw:custom-shape draw:name="Shape 18" draw:style-name="gr20" draw:text-style-name="P1" draw:layer="layout" svg:width="0.304cm" svg:height="0.304cm" svg:x="21.819cm" svg:y="6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19" draw:style-name="gr4" draw:text-style-name="P6" draw:layer="layout" svg:width="1.117cm" svg:height="0.558cm" svg:x="21.412cm" svg:y="6.731cm">
          <text:p text:style-name="P19"><text:span text:style-name="T16">2025</text:span></text:p>
          <draw:enhanced-geometry svg:viewBox="0 0 21600 21600" draw:type="rectangle" draw:enhanced-path="M 0 0 L 21600 0 21600 21600 0 21600 0 0 Z N"/>
        </draw:custom-shape>
        <draw:custom-shape draw:name="Shape 20" draw:style-name="gr21" draw:text-style-name="P1" draw:layer="layout" svg:width="5.841cm" svg:height="0.913cm" svg:x="2.159cm" svg:y="4.8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21" draw:style-name="gr4" draw:text-style-name="P6" draw:layer="layout" svg:width="5.435cm" svg:height="0.659cm" svg:x="2.362cm" svg:y="4.978cm">
          <text:p text:style-name="P19"><text:span text:style-name="T17">Training: 2019–2024</text:span></text:p>
          <draw:enhanced-geometry svg:viewBox="0 0 21600 21600" draw:type="rectangle" draw:enhanced-path="M 0 0 L 21600 0 21600 21600 0 21600 0 0 Z N"/>
        </draw:custom-shape>
        <draw:custom-shape draw:name="Shape 22" draw:style-name="gr22" draw:text-style-name="P1" draw:layer="layout" svg:width="6.095cm" svg:height="0.913cm" svg:x="15.621cm" svg:y="4.8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23" draw:style-name="gr4" draw:text-style-name="P6" draw:layer="layout" svg:width="5.689cm" svg:height="0.659cm" svg:x="15.824cm" svg:y="4.978cm">
          <text:p text:style-name="P19"><text:span text:style-name="T17">Finale Evaluation: 2025</text:span></text:p>
          <draw:enhanced-geometry svg:viewBox="0 0 21600 21600" draw:type="rectangle" draw:enhanced-path="M 0 0 L 21600 0 21600 21600 0 21600 0 0 Z N"/>
        </draw:custom-shape>
        <draw:custom-shape draw:name="Shape 24" draw:style-name="gr23" draw:text-style-name="P1" draw:layer="layout" svg:width="6.73cm" svg:height="3.682cm" svg:x="2.159cm" svg:y="8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25" draw:style-name="gr24" draw:text-style-name="P1" draw:layer="layout" svg:width="6.73cm" svg:height="0.304cm" svg:x="2.159cm" svg:y="8.509cm">
          <text:p/>
          <draw:enhanced-geometry svg:viewBox="0 0 21600 21600" draw:type="rectangle" draw:enhanced-path="M 0 0 L 21600 0 21600 21600 0 21600 0 0 Z N"/>
        </draw:custom-shape>
        <draw:custom-shape draw:name="Text 26" draw:style-name="gr4" draw:text-style-name="P6" draw:layer="layout" svg:width="5.714cm" svg:height="0.71cm" svg:x="2.616cm" svg:y="9.144cm">
          <text:p text:style-name="P2"><text:span text:style-name="T18">Kaggle</text:span></text:p>
          <draw:enhanced-geometry svg:viewBox="0 0 21600 21600" draw:type="rectangle" draw:enhanced-path="M 0 0 L 21600 0 21600 21600 0 21600 0 0 Z N"/>
        </draw:custom-shape>
        <draw:custom-shape draw:name="Text 27" draw:style-name="gr4" draw:text-style-name="P6" draw:layer="layout" svg:width="5.587cm" svg:height="1.396cm" svg:x="2.616cm" svg:y="10.211cm">
          <text:p text:style-name="P2"><text:span text:style-name="T19">Stündliche Lastdaten</text:span></text:p>
          <text:p text:style-name="P2"><text:span text:style-name="T19">CountryCode = DE</text:span></text:p>
          <draw:enhanced-geometry svg:viewBox="0 0 21600 21600" draw:type="rectangle" draw:enhanced-path="M 0 0 L 21600 0 21600 21600 0 21600 0 0 Z N"/>
        </draw:custom-shape>
        <draw:custom-shape draw:name="Shape 28" draw:style-name="gr23" draw:text-style-name="P1" draw:layer="layout" svg:width="6.73cm" svg:height="3.682cm" svg:x="9.906cm" svg:y="8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29" draw:style-name="gr7" draw:text-style-name="P1" draw:layer="layout" svg:width="6.73cm" svg:height="0.304cm" svg:x="9.906cm" svg:y="8.509cm">
          <text:p/>
          <draw:enhanced-geometry svg:viewBox="0 0 21600 21600" draw:type="rectangle" draw:enhanced-path="M 0 0 L 21600 0 21600 21600 0 21600 0 0 Z N"/>
        </draw:custom-shape>
        <draw:custom-shape draw:name="Text 30" draw:style-name="gr4" draw:text-style-name="P6" draw:layer="layout" svg:width="5.714cm" svg:height="0.71cm" svg:x="10.363cm" svg:y="9.144cm">
          <text:p text:style-name="P2"><text:span text:style-name="T18">Open-Meteo</text:span></text:p>
          <draw:enhanced-geometry svg:viewBox="0 0 21600 21600" draw:type="rectangle" draw:enhanced-path="M 0 0 L 21600 0 21600 21600 0 21600 0 0 Z N"/>
        </draw:custom-shape>
        <draw:custom-shape draw:name="Text 31" draw:style-name="gr4" draw:text-style-name="P6" draw:layer="layout" svg:width="5.587cm" svg:height="1.396cm" svg:x="10.363cm" svg:y="10.211cm">
          <text:p text:style-name="P2"><text:span text:style-name="T19">Historisches Wetter</text:span></text:p>
          <text:p text:style-name="P2"><text:span text:style-name="T19">Top-5-Städte nach Population gewichtet</text:span></text:p>
          <draw:enhanced-geometry svg:viewBox="0 0 21600 21600" draw:type="rectangle" draw:enhanced-path="M 0 0 L 21600 0 21600 21600 0 21600 0 0 Z N"/>
        </draw:custom-shape>
        <draw:custom-shape draw:name="Shape 32" draw:style-name="gr23" draw:text-style-name="P1" draw:layer="layout" svg:width="6.73cm" svg:height="3.682cm" svg:x="17.653cm" svg:y="8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33" draw:style-name="gr8" draw:text-style-name="P1" draw:layer="layout" svg:width="6.73cm" svg:height="0.304cm" svg:x="17.653cm" svg:y="8.509cm">
          <text:p/>
          <draw:enhanced-geometry svg:viewBox="0 0 21600 21600" draw:type="rectangle" draw:enhanced-path="M 0 0 L 21600 0 21600 21600 0 21600 0 0 Z N"/>
        </draw:custom-shape>
        <draw:custom-shape draw:name="Text 34" draw:style-name="gr4" draw:text-style-name="P6" draw:layer="layout" svg:width="5.714cm" svg:height="0.71cm" svg:x="18.11cm" svg:y="9.144cm">
          <text:p text:style-name="P2"><text:span text:style-name="T18">python-holidays</text:span></text:p>
          <draw:enhanced-geometry svg:viewBox="0 0 21600 21600" draw:type="rectangle" draw:enhanced-path="M 0 0 L 21600 0 21600 21600 0 21600 0 0 Z N"/>
        </draw:custom-shape>
        <draw:custom-shape draw:name="Text 35" draw:style-name="gr4" draw:text-style-name="P6" draw:layer="layout" svg:width="5.587cm" svg:height="1.396cm" svg:x="18.11cm" svg:y="10.211cm">
          <text:p text:style-name="P2"><text:span text:style-name="T19">Feiertage, Brückentage,</text:span></text:p>
          <text:p text:style-name="P2"><text:span text:style-name="T19">Bundesland-Anteil</text:span></text:p>
          <draw:enhanced-geometry svg:viewBox="0 0 21600 21600" draw:type="rectangle" draw:enhanced-path="M 0 0 L 21600 0 21600 21600 0 21600 0 0 Z N"/>
        </draw:custom-shape>
        <draw:custom-shape draw:name="Shape 36" draw:style-name="gr23" draw:text-style-name="P1" draw:layer="layout" svg:width="6.73cm" svg:height="3.682cm" svg:x="25.4cm" svg:y="8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37" draw:style-name="gr2" draw:text-style-name="P1" draw:layer="layout" svg:width="6.73cm" svg:height="0.304cm" svg:x="25.4cm" svg:y="8.509cm">
          <text:p/>
          <draw:enhanced-geometry svg:viewBox="0 0 21600 21600" draw:type="rectangle" draw:enhanced-path="M 0 0 L 21600 0 21600 21600 0 21600 0 0 Z N"/>
        </draw:custom-shape>
        <draw:custom-shape draw:name="Text 38" draw:style-name="gr4" draw:text-style-name="P6" draw:layer="layout" svg:width="5.714cm" svg:height="0.71cm" svg:x="25.857cm" svg:y="9.144cm">
          <text:p text:style-name="P2"><text:span text:style-name="T18">SMARD API</text:span></text:p>
          <draw:enhanced-geometry svg:viewBox="0 0 21600 21600" draw:type="rectangle" draw:enhanced-path="M 0 0 L 21600 0 21600 21600 0 21600 0 0 Z N"/>
        </draw:custom-shape>
        <draw:custom-shape draw:name="Text 39" draw:style-name="gr4" draw:text-style-name="P6" draw:layer="layout" svg:width="5.587cm" svg:height="1.396cm" svg:x="25.857cm" svg:y="10.211cm">
          <text:p text:style-name="P2"><text:span text:style-name="T19">Aktuelle Netzlast +</text:span></text:p>
          <text:p text:style-name="P2"><text:span text:style-name="T19">offizielle Prognose</text:span></text:p>
          <draw:enhanced-geometry svg:viewBox="0 0 21600 21600" draw:type="rectangle" draw:enhanced-path="M 0 0 L 21600 0 21600 21600 0 21600 0 0 Z N"/>
        </draw:custom-shape>
        <draw:custom-shape draw:name="Shape 40" draw:style-name="gr25" draw:text-style-name="P1" draw:layer="layout" svg:width="29.463cm" svg:height="1.98cm" svg:x="2.159cm" svg:y="14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41" draw:style-name="gr4" draw:text-style-name="P6" draw:layer="layout" svg:width="27.685cm" svg:height="0.837cm" svg:x="2.794cm" svg:y="14.529cm">
          <text:p text:style-name="P2"><text:span text:style-name="T20">Wichtig für die Glaubwürdigkeit: im README die Datenlizenzen/Attribution (ENTSO-E, CC BY-SA 4.0) klar sichtbar lassen.</text:span></text:p>
          <draw:enhanced-geometry svg:viewBox="0 0 21600 21600" draw:type="rectangle" draw:enhanced-path="M 0 0 L 21600 0 21600 21600 0 21600 0 0 Z N"/>
        </draw:custom-shape>
        <draw:custom-shape draw:name="Text 42" draw:style-name="gr4" draw:text-style-name="P6" draw:layer="layout" svg:width="17.779cm" svg:height="0.558cm" svg:x="1.524cm" svg:y="18.136cm">
          <text:p text:style-name="P2"><text:span text:style-name="T14">electricity_demand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43" draw:style-name="gr4" draw:text-style-name="P6" draw:layer="layout" svg:width="1.269cm" svg:height="0.558cm" svg:x="31.115cm" svg:y="18.136cm">
          <text:p text:style-name="P11"><text:span text:style-name="T14">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0" draw:layer="layout" svg:width="15.239cm" svg:height="8.572cm" svg:x="1.905cm" svg:y="3.175cm" draw:page-number="3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mer&gt;</text:page-number></text:span></text:p>
            </draw:text-box>
          </draw:frame>
        </presentation:notes>
      </draw:page>
      <draw:page draw:name="Slide 4" draw:style-name="dp3" draw:master-page-name="Standard">
        <office:forms form:automatic-focus="false" form:apply-design-mode="false"/>
        <draw:custom-shape draw:name="Shape 0" draw:style-name="gr7" draw:text-style-name="P1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4" draw:text-style-name="P6" draw:layer="layout" svg:width="6.476cm" svg:height="0.609cm" svg:x="25.527cm" svg:y="0.813cm">
          <text:p text:style-name="P11"><text:span text:style-name="T8">EDA</text:span></text:p>
          <draw:enhanced-geometry svg:viewBox="0 0 21600 21600" draw:type="rectangle" draw:enhanced-path="M 0 0 L 21600 0 21600 21600 0 21600 0 0 Z N"/>
        </draw:custom-shape>
        <draw:custom-shape draw:name="Text 2" draw:style-name="gr26" draw:text-style-name="P17" draw:layer="layout" svg:width="28.037cm" svg:height="1.421cm" svg:x="1.524cm" svg:y="1.067cm">
          <text:p text:style-name="P2"><text:span text:style-name="T9">EDA: Saison, Trend und kurzfristige Wettereffekte</text:span></text:p>
          <draw:enhanced-geometry svg:viewBox="0 0 21600 21600" draw:type="rectangle" draw:enhanced-path="M 0 0 L 21600 0 21600 21600 0 21600 0 0 Z N"/>
        </draw:custom-shape>
        <draw:line draw:name="Shape 3" draw:style-name="gr12" draw:text-style-name="P13" draw:layer="layout" svg:x1="1.524cm" svg:y1="2.59cm" svg:x2="32.131cm" svg:y2="2.59cm">
          <text:p/>
        </draw:line>
        <draw:frame draw:name="Image 0" draw:style-name="gr27" draw:text-style-name="P13" draw:layer="layout" svg:width="14.333cm" svg:height="7.924cm" svg:x="1.803cm" svg:y="3.635cm">
          <draw:image xlink:href="Pictures/1000020100000366000001E1BBE6CECC.png" xlink:type="simple" xlink:show="embed" xlink:actuate="onLoad">
            <text:p/>
          </draw:image>
        </draw:frame>
        <draw:frame draw:name="Image 1" draw:style-name="gr27" draw:text-style-name="P13" draw:layer="layout" svg:width="10.644cm" svg:height="7.924cm" svg:x="19.061cm" svg:y="3.429cm">
          <draw:image xlink:href="Pictures/1000020100000276000001D533415BAE.png" xlink:type="simple" xlink:show="embed" xlink:actuate="onLoad">
            <text:p/>
          </draw:image>
        </draw:frame>
        <draw:custom-shape draw:name="Shape 6" draw:style-name="gr28" draw:text-style-name="P1" draw:layer="layout" svg:width="29.336cm" svg:height="3.494cm" svg:x="2.159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7" draw:style-name="gr4" draw:text-style-name="P6" draw:layer="layout" svg:width="8.254cm" svg:height="0.761cm" svg:x="2.794cm" svg:y="13.157cm">
          <text:p text:style-name="P2"><text:span text:style-name="T18">Kernaussage für Stakeholder</text:span></text:p>
          <draw:enhanced-geometry svg:viewBox="0 0 21600 21600" draw:type="rectangle" draw:enhanced-path="M 0 0 L 21600 0 21600 21600 0 21600 0 0 Z N"/>
        </draw:custom-shape>
        <draw:custom-shape draw:name="Text 8" draw:style-name="gr4" draw:text-style-name="P6" draw:layer="layout" svg:width="27.685cm" svg:height="1.32cm" svg:x="2.794cm" svg:y="14.097cm">
          <text:list text:style-name="L3">
            <text:list-item>
              <text:p text:style-name="P2"><text:span text:style-name="T21">Der Stromverbrauch hat deutliche Tages-, Wochen- und Jahressaisonalität.</text:span></text:p>
            </text:list-item>
            <text:list-item>
              <text:p text:style-name="P2"><text:span text:style-name="T21">Wetterdaten helfen, erklären aber nicht den gesamten Verbrauch — Industrie und Verhalten bleiben relevante externe Faktoren.</text:span></text:p>
            </text:list-item>
            <text:list-item>
              <text:p text:style-name="P2"><text:span text:style-name="T21">Kalenderereignisse sind sichtbar und sollten getrennt ausgewertet werden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 9" draw:style-name="gr4" draw:text-style-name="P6" draw:layer="layout" svg:width="17.779cm" svg:height="0.558cm" svg:x="1.524cm" svg:y="18.136cm">
          <text:p text:style-name="P2"><text:span text:style-name="T14">electricity_demand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10" draw:style-name="gr4" draw:text-style-name="P6" draw:layer="layout" svg:width="1.269cm" svg:height="0.558cm" svg:x="31.115cm" svg:y="18.136cm">
          <text:p text:style-name="P11"><text:span text:style-name="T14">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0" draw:layer="layout" svg:width="15.239cm" svg:height="8.572cm" svg:x="1.905cm" svg:y="3.175cm" draw:page-number="4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mer&gt;</text:page-number></text:span></text:p>
            </draw:text-box>
          </draw:frame>
        </presentation:notes>
      </draw:page>
      <draw:page draw:name="Slide 5" draw:style-name="dp3" draw:master-page-name="Standard">
        <office:forms form:automatic-focus="false" form:apply-design-mode="false"/>
        <draw:custom-shape draw:name="Shape 0" draw:style-name="gr7" draw:text-style-name="P1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4" draw:text-style-name="P6" draw:layer="layout" svg:width="6.476cm" svg:height="0.609cm" svg:x="25.527cm" svg:y="0.813cm">
          <text:p text:style-name="P11"><text:span text:style-name="T8">PIPELINE</text:span></text:p>
          <draw:enhanced-geometry svg:viewBox="0 0 21600 21600" draw:type="rectangle" draw:enhanced-path="M 0 0 L 21600 0 21600 21600 0 21600 0 0 Z N"/>
        </draw:custom-shape>
        <draw:custom-shape draw:name="Text 2" draw:style-name="gr29" draw:text-style-name="P17" draw:layer="layout" svg:width="28.835cm" svg:height="1.421cm" svg:x="1.524cm" svg:y="1.067cm">
          <text:p text:style-name="P2"><text:span text:style-name="T9">Feature Engineering: starke Signale statt Modellkomplexität</text:span></text:p>
          <draw:enhanced-geometry svg:viewBox="0 0 21600 21600" draw:type="rectangle" draw:enhanced-path="M 0 0 L 21600 0 21600 21600 0 21600 0 0 Z N"/>
        </draw:custom-shape>
        <draw:line draw:name="Shape 3" draw:style-name="gr12" draw:text-style-name="P13" draw:layer="layout" svg:x1="1.524cm" svg:y1="2.59cm" svg:x2="32.131cm" svg:y2="2.59cm">
          <text:p/>
        </draw:line>
        <draw:custom-shape draw:name="Text 4" draw:style-name="gr4" draw:text-style-name="P6" draw:layer="layout" svg:width="25.399cm" svg:height="1.066cm" svg:x="1.524cm" svg:y="3.048cm">
          <text:p text:style-name="P2"><text:span text:style-name="T3">Die größte Qualitätssteigerung entsteht durch saubere Zeitreihenfeatures und Leakage-sichere Rolling-Werte.</text:span></text:p>
          <draw:enhanced-geometry svg:viewBox="0 0 21600 21600" draw:type="rectangle" draw:enhanced-path="M 0 0 L 21600 0 21600 21600 0 21600 0 0 Z N"/>
        </draw:custom-shape>
        <draw:custom-shape draw:name="Shape 5" draw:style-name="gr23" draw:text-style-name="P1" draw:layer="layout" svg:width="9.016cm" svg:height="7.746cm" svg:x="2.083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6" draw:style-name="gr24" draw:text-style-name="P1" draw:layer="layout" svg:width="9.016cm" svg:height="0.304cm" svg:x="2.083cm" svg:y="5.08cm">
          <text:p/>
          <draw:enhanced-geometry svg:viewBox="0 0 21600 21600" draw:type="rectangle" draw:enhanced-path="M 0 0 L 21600 0 21600 21600 0 21600 0 0 Z N"/>
        </draw:custom-shape>
        <draw:custom-shape draw:name="Text 7" draw:style-name="gr4" draw:text-style-name="P6" draw:layer="layout" svg:width="7.111cm" svg:height="0.812cm" svg:x="2.718cm" svg:y="6.015cm">
          <text:p text:style-name="P2"><text:span text:style-name="T22">Zeit &amp; Kalender</text:span></text:p>
          <draw:enhanced-geometry svg:viewBox="0 0 21600 21600" draw:type="rectangle" draw:enhanced-path="M 0 0 L 21600 0 21600 21600 0 21600 0 0 Z N"/>
        </draw:custom-shape>
        <draw:custom-shape draw:name="Text 8" draw:style-name="gr4" draw:text-style-name="P6" draw:layer="layout" svg:width="7.746cm" svg:height="4.19cm" svg:x="2.769cm" svg:y="7.061cm">
          <text:list text:style-name="L3">
            <text:list-item>
              <text:p text:style-name="P2"><text:span text:style-name="T21">hour, weekday, month</text:span></text:p>
            </text:list-item>
            <text:list-item>
              <text:p text:style-name="P2"><text:span text:style-name="T21">is_weekend, is_workday</text:span></text:p>
            </text:list-item>
            <text:list-item>
              <text:p text:style-name="P2"><text:span text:style-name="T21">holiday_ratio, holiday_weight(bridge_day)</text:span></text:p>
            </text:list-item>
            <text:list-item>
              <text:p text:style-name="P2"><text:span text:style-name="T21">is_pandemic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9" draw:style-name="gr23" draw:text-style-name="P1" draw:layer="layout" svg:width="9.016cm" svg:height="7.746cm" svg:x="12.49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0" draw:style-name="gr7" draw:text-style-name="P1" draw:layer="layout" svg:width="9.016cm" svg:height="0.304cm" svg:x="12.497cm" svg:y="5.08cm">
          <text:p/>
          <draw:enhanced-geometry svg:viewBox="0 0 21600 21600" draw:type="rectangle" draw:enhanced-path="M 0 0 L 21600 0 21600 21600 0 21600 0 0 Z N"/>
        </draw:custom-shape>
        <draw:custom-shape draw:name="Text 11" draw:style-name="gr4" draw:text-style-name="P6" draw:layer="layout" svg:width="7.111cm" svg:height="0.812cm" svg:x="13.132cm" svg:y="6.015cm">
          <text:p text:style-name="P2"><text:span text:style-name="T22">Wetter</text:span></text:p>
          <draw:enhanced-geometry svg:viewBox="0 0 21600 21600" draw:type="rectangle" draw:enhanced-path="M 0 0 L 21600 0 21600 21600 0 21600 0 0 Z N"/>
        </draw:custom-shape>
        <draw:custom-shape draw:name="Text 12" draw:style-name="gr4" draw:text-style-name="P6" draw:layer="layout" svg:width="7.746cm" svg:height="4.19cm" svg:x="13.183cm" svg:y="7.061cm">
          <text:list text:style-name="L3">
            <text:list-item>
              <text:p text:style-name="P2"><text:span text:style-name="T21">apparent_temperature</text:span></text:p>
            </text:list-item>
            <text:list-item>
              <text:p text:style-name="P2"><text:span text:style-name="T21">rain / snowfall</text:span></text:p>
            </text:list-item>
            <text:list-item>
              <text:p text:style-name="P2"><text:span text:style-name="T21">wind_speed_10m</text:span></text:p>
            </text:list-item>
            <text:list-item>
              <text:p text:style-name="P2"><text:span text:style-name="T21">shortwave_radiation</text:span></text:p>
            </text:list-item>
            <text:list-item>
              <text:p text:style-name="P2"><text:span text:style-name="T21">heating/cooling_degre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13" draw:style-name="gr23" draw:text-style-name="P1" draw:layer="layout" svg:width="9.016cm" svg:height="7.746cm" svg:x="22.91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4" draw:style-name="gr8" draw:text-style-name="P1" draw:layer="layout" svg:width="9.016cm" svg:height="0.304cm" svg:x="22.911cm" svg:y="5.08cm">
          <text:p/>
          <draw:enhanced-geometry svg:viewBox="0 0 21600 21600" draw:type="rectangle" draw:enhanced-path="M 0 0 L 21600 0 21600 21600 0 21600 0 0 Z N"/>
        </draw:custom-shape>
        <draw:custom-shape draw:name="Text 15" draw:style-name="gr4" draw:text-style-name="P6" draw:layer="layout" svg:width="7.111cm" svg:height="0.812cm" svg:x="23.546cm" svg:y="6.015cm">
          <text:p text:style-name="P2"><text:span text:style-name="T22">Last-Historie</text:span></text:p>
          <draw:enhanced-geometry svg:viewBox="0 0 21600 21600" draw:type="rectangle" draw:enhanced-path="M 0 0 L 21600 0 21600 21600 0 21600 0 0 Z N"/>
        </draw:custom-shape>
        <draw:custom-shape draw:name="Text 16" draw:style-name="gr4" draw:text-style-name="P6" draw:layer="layout" svg:width="7.746cm" svg:height="4.19cm" svg:x="23.597cm" svg:y="7.061cm">
          <text:list text:style-name="L3">
            <text:list-item>
              <text:p text:style-name="P2"><text:span text:style-name="T21">lag_24h, lag_168h</text:span></text:p>
            </text:list-item>
            <text:list-item>
              <text:p text:style-name="P2"><text:span text:style-name="T21">rolling_mean_24h</text:span></text:p>
            </text:list-item>
            <text:list-item>
              <text:p text:style-name="P2"><text:span text:style-name="T21">rolling_mean_168h</text:span></text:p>
            </text:list-item>
            <text:list-item>
              <text:p text:style-name="P2"><text:span text:style-name="T21">shift(24) gegen Leakage</text:span></text:p>
            </text:list-item>
            <text:list-item>
              <text:p text:style-name="P2"><text:span text:style-name="T21">wichtigster Modelltreib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17" draw:style-name="gr30" draw:text-style-name="P1" draw:layer="layout" svg:width="29.463cm" svg:height="2.183cm" svg:x="2.159cm" svg:y="14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18" draw:style-name="gr4" draw:text-style-name="P6" draw:layer="layout" svg:width="27.177cm" svg:height="0.888cm" svg:x="2.794cm" svg:y="14.605cm">
          <text:p text:style-name="P2"><text:span text:style-name="T23">Verbesserungsvorschlag: Feiertagsnamen, Schulferienratio und ggf. Industrieproduktionsindex ergänzen, weil Feiertage aktuell noch überschätzt werden.</text:span></text:p>
          <draw:enhanced-geometry svg:viewBox="0 0 21600 21600" draw:type="rectangle" draw:enhanced-path="M 0 0 L 21600 0 21600 21600 0 21600 0 0 Z N"/>
        </draw:custom-shape>
        <draw:custom-shape draw:name="Text 19" draw:style-name="gr4" draw:text-style-name="P6" draw:layer="layout" svg:width="17.779cm" svg:height="0.558cm" svg:x="1.524cm" svg:y="18.136cm">
          <text:p text:style-name="P2"><text:span text:style-name="T14">electricity_demand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20" draw:style-name="gr4" draw:text-style-name="P6" draw:layer="layout" svg:width="1.269cm" svg:height="0.558cm" svg:x="31.115cm" svg:y="18.136cm">
          <text:p text:style-name="P11"><text:span text:style-name="T14">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0" draw:layer="layout" svg:width="15.239cm" svg:height="8.572cm" svg:x="1.905cm" svg:y="3.175cm" draw:page-number="5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mer&gt;</text:page-number></text:span></text:p>
            </draw:text-box>
          </draw:frame>
        </presentation:notes>
      </draw:page>
      <draw:page draw:name="Slide 6" draw:style-name="dp3" draw:master-page-name="Standard">
        <office:forms form:automatic-focus="false" form:apply-design-mode="false"/>
        <draw:custom-shape draw:name="Shape 0" draw:style-name="gr7" draw:text-style-name="P1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4" draw:text-style-name="P6" draw:layer="layout" svg:width="6.476cm" svg:height="0.609cm" svg:x="25.527cm" svg:y="0.813cm">
          <text:p text:style-name="P11"><text:span text:style-name="T8">TRAINING</text:span></text:p>
          <draw:enhanced-geometry svg:viewBox="0 0 21600 21600" draw:type="rectangle" draw:enhanced-path="M 0 0 L 21600 0 21600 21600 0 21600 0 0 Z N"/>
        </draw:custom-shape>
        <draw:custom-shape draw:name="Text 2" draw:style-name="gr31" draw:text-style-name="P17" draw:layer="layout" svg:width="29.314cm" svg:height="1.421cm" svg:x="1.524cm" svg:y="1.067cm">
          <text:p text:style-name="P2"><text:span text:style-name="T9">Modellvergleich: XGBoost/LightGBM liegen nahe beieinander</text:span></text:p>
          <draw:enhanced-geometry svg:viewBox="0 0 21600 21600" draw:type="rectangle" draw:enhanced-path="M 0 0 L 21600 0 21600 21600 0 21600 0 0 Z N"/>
        </draw:custom-shape>
        <draw:line draw:name="Shape 3" draw:style-name="gr12" draw:text-style-name="P13" draw:layer="layout" svg:x1="1.524cm" svg:y1="2.59cm" svg:x2="32.131cm" svg:y2="2.59cm">
          <text:p/>
        </draw:line>
        <draw:custom-shape draw:name="Shape 5" draw:style-name="gr32" draw:text-style-name="P1" draw:layer="layout" svg:width="12.699cm" svg:height="0.964cm" svg:x="2.083cm" svg:y="3.302cm">
          <text:p/>
          <draw:enhanced-geometry svg:viewBox="0 0 21600 21600" draw:type="rectangle" draw:enhanced-path="M 0 0 L 21600 0 21600 21600 0 21600 0 0 Z N"/>
        </draw:custom-shape>
        <draw:custom-shape draw:name="Text 6" draw:style-name="gr4" draw:text-style-name="P7" draw:layer="layout" svg:width="3.86cm" svg:height="0.558cm" svg:x="2.21cm" svg:y="3.505cm">
          <text:p text:style-name="P2"><text:span text:style-name="T11">Modell</text:span></text:p>
          <draw:enhanced-geometry svg:viewBox="0 0 21600 21600" draw:type="rectangle" draw:enhanced-path="M 0 0 L 21600 0 21600 21600 0 21600 0 0 Z N"/>
        </draw:custom-shape>
        <draw:custom-shape draw:name="Text 7" draw:style-name="gr4" draw:text-style-name="P7" draw:layer="layout" svg:width="1.929cm" svg:height="0.558cm" svg:x="6.325cm" svg:y="3.505cm">
          <text:p text:style-name="P19"><text:span text:style-name="T11">MAE</text:span></text:p>
          <draw:enhanced-geometry svg:viewBox="0 0 21600 21600" draw:type="rectangle" draw:enhanced-path="M 0 0 L 21600 0 21600 21600 0 21600 0 0 Z N"/>
        </draw:custom-shape>
        <draw:custom-shape draw:name="Text 8" draw:style-name="gr4" draw:text-style-name="P7" draw:layer="layout" svg:width="2.133cm" svg:height="0.558cm" svg:x="8.509cm" svg:y="3.505cm">
          <text:p text:style-name="P19"><text:span text:style-name="T11">RMSE</text:span></text:p>
          <draw:enhanced-geometry svg:viewBox="0 0 21600 21600" draw:type="rectangle" draw:enhanced-path="M 0 0 L 21600 0 21600 21600 0 21600 0 0 Z N"/>
        </draw:custom-shape>
        <draw:custom-shape draw:name="Text 9" draw:style-name="gr4" draw:text-style-name="P7" draw:layer="layout" svg:width="1.167cm" svg:height="0.558cm" svg:x="10.897cm" svg:y="3.505cm">
          <text:p text:style-name="P19"><text:span text:style-name="T11">R²</text:span></text:p>
          <draw:enhanced-geometry svg:viewBox="0 0 21600 21600" draw:type="rectangle" draw:enhanced-path="M 0 0 L 21600 0 21600 21600 0 21600 0 0 Z N"/>
        </draw:custom-shape>
        <draw:custom-shape draw:name="Text 10" draw:style-name="gr4" draw:text-style-name="P7" draw:layer="layout" svg:width="1.828cm" svg:height="0.558cm" svg:x="12.319cm" svg:y="3.505cm">
          <text:p text:style-name="P19"><text:span text:style-name="T11">Dauer</text:span></text:p>
          <draw:enhanced-geometry svg:viewBox="0 0 21600 21600" draw:type="rectangle" draw:enhanced-path="M 0 0 L 21600 0 21600 21600 0 21600 0 0 Z N"/>
        </draw:custom-shape>
        <draw:custom-shape draw:name="Shape 11" draw:style-name="gr33" draw:text-style-name="P1" draw:layer="layout" svg:width="12.699cm" svg:height="0.99cm" svg:x="2.083cm" svg:y="4.267cm">
          <text:p/>
          <draw:enhanced-geometry svg:viewBox="0 0 21600 21600" draw:type="rectangle" draw:enhanced-path="M 0 0 L 21600 0 21600 21600 0 21600 0 0 Z N"/>
        </draw:custom-shape>
        <draw:custom-shape draw:name="Text 12" draw:style-name="gr4" draw:text-style-name="P6" draw:layer="layout" svg:width="3.86cm" svg:height="0.558cm" svg:x="2.21cm" svg:y="4.496cm">
          <text:p text:style-name="P2"><text:span text:style-name="T24">XGBoost</text:span></text:p>
          <draw:enhanced-geometry svg:viewBox="0 0 21600 21600" draw:type="rectangle" draw:enhanced-path="M 0 0 L 21600 0 21600 21600 0 21600 0 0 Z N"/>
        </draw:custom-shape>
        <draw:custom-shape draw:name="Text 13" draw:style-name="gr4" draw:text-style-name="P6" draw:layer="layout" svg:width="1.929cm" svg:height="0.558cm" svg:x="6.325cm" svg:y="4.496cm">
          <text:p text:style-name="P19"><text:span text:style-name="T24">1156.96</text:span></text:p>
          <draw:enhanced-geometry svg:viewBox="0 0 21600 21600" draw:type="rectangle" draw:enhanced-path="M 0 0 L 21600 0 21600 21600 0 21600 0 0 Z N"/>
        </draw:custom-shape>
        <draw:custom-shape draw:name="Text 14" draw:style-name="gr4" draw:text-style-name="P6" draw:layer="layout" svg:width="2.133cm" svg:height="0.558cm" svg:x="8.509cm" svg:y="4.496cm">
          <text:p text:style-name="P19"><text:span text:style-name="T5">1500.81</text:span></text:p>
          <draw:enhanced-geometry svg:viewBox="0 0 21600 21600" draw:type="rectangle" draw:enhanced-path="M 0 0 L 21600 0 21600 21600 0 21600 0 0 Z N"/>
        </draw:custom-shape>
        <draw:custom-shape draw:name="Text 15" draw:style-name="gr4" draw:text-style-name="P6" draw:layer="layout" svg:width="1.167cm" svg:height="0.558cm" svg:x="10.897cm" svg:y="4.496cm">
          <text:p text:style-name="P19"><text:span text:style-name="T5">0.97</text:span></text:p>
          <draw:enhanced-geometry svg:viewBox="0 0 21600 21600" draw:type="rectangle" draw:enhanced-path="M 0 0 L 21600 0 21600 21600 0 21600 0 0 Z N"/>
        </draw:custom-shape>
        <draw:custom-shape draw:name="Text 16" draw:style-name="gr4" draw:text-style-name="P6" draw:layer="layout" svg:width="1.828cm" svg:height="0.558cm" svg:x="12.319cm" svg:y="4.496cm">
          <text:p text:style-name="P19"><text:span text:style-name="T5">10′55″</text:span></text:p>
          <draw:enhanced-geometry svg:viewBox="0 0 21600 21600" draw:type="rectangle" draw:enhanced-path="M 0 0 L 21600 0 21600 21600 0 21600 0 0 Z N"/>
        </draw:custom-shape>
        <draw:line draw:name="Shape 17" draw:style-name="gr34" draw:text-style-name="P13" draw:layer="layout" svg:x1="2.082cm" svg:y1="5.257cm" svg:x2="14.782cm" svg:y2="5.257cm">
          <text:p/>
        </draw:line>
        <draw:custom-shape draw:name="Text 18" draw:style-name="gr4" draw:text-style-name="P6" draw:layer="layout" svg:width="3.86cm" svg:height="0.558cm" svg:x="2.21cm" svg:y="5.486cm">
          <text:p text:style-name="P2"><text:span text:style-name="T5">LightGBM</text:span></text:p>
          <draw:enhanced-geometry svg:viewBox="0 0 21600 21600" draw:type="rectangle" draw:enhanced-path="M 0 0 L 21600 0 21600 21600 0 21600 0 0 Z N"/>
        </draw:custom-shape>
        <draw:custom-shape draw:name="Text 19" draw:style-name="gr4" draw:text-style-name="P6" draw:layer="layout" svg:width="1.929cm" svg:height="0.558cm" svg:x="6.325cm" svg:y="5.486cm">
          <text:p text:style-name="P19"><text:span text:style-name="T5"><text:s/></text:span><text:span text:style-name="T5">1219.06</text:span></text:p>
          <draw:enhanced-geometry svg:viewBox="0 0 21600 21600" draw:type="rectangle" draw:enhanced-path="M 0 0 L 21600 0 21600 21600 0 21600 0 0 Z N"/>
        </draw:custom-shape>
        <draw:custom-shape draw:name="Text 20" draw:style-name="gr4" draw:text-style-name="P6" draw:layer="layout" svg:width="2.133cm" svg:height="0.558cm" svg:x="8.509cm" svg:y="5.486cm">
          <text:p text:style-name="P19"><text:span text:style-name="T5">1604.48</text:span></text:p>
          <draw:enhanced-geometry svg:viewBox="0 0 21600 21600" draw:type="rectangle" draw:enhanced-path="M 0 0 L 21600 0 21600 21600 0 21600 0 0 Z N"/>
        </draw:custom-shape>
        <draw:custom-shape draw:name="Text 21" draw:style-name="gr4" draw:text-style-name="P6" draw:layer="layout" svg:width="1.167cm" svg:height="0.558cm" svg:x="10.897cm" svg:y="5.486cm">
          <text:p text:style-name="P19"><text:span text:style-name="T5">0.97</text:span></text:p>
          <draw:enhanced-geometry svg:viewBox="0 0 21600 21600" draw:type="rectangle" draw:enhanced-path="M 0 0 L 21600 0 21600 21600 0 21600 0 0 Z N"/>
        </draw:custom-shape>
        <draw:custom-shape draw:name="Text 22" draw:style-name="gr4" draw:text-style-name="P6" draw:layer="layout" svg:width="1.828cm" svg:height="0.558cm" svg:x="12.319cm" svg:y="5.486cm">
          <text:p text:style-name="P19"><text:span text:style-name="T5">2′30″</text:span></text:p>
          <draw:enhanced-geometry svg:viewBox="0 0 21600 21600" draw:type="rectangle" draw:enhanced-path="M 0 0 L 21600 0 21600 21600 0 21600 0 0 Z N"/>
        </draw:custom-shape>
        <draw:line draw:name="Shape 23" draw:style-name="gr35" draw:text-style-name="P13" draw:layer="layout" svg:x1="2.082cm" svg:y1="6.248cm" svg:x2="14.782cm" svg:y2="6.248cm">
          <text:p/>
        </draw:line>
        <draw:custom-shape draw:name="Text 30" draw:style-name="gr4" draw:text-style-name="P6" draw:layer="layout" svg:width="4.571cm" svg:height="0.761cm" svg:x="2.159cm" svg:y="7.747cm">
          <text:p text:style-name="P2"><text:span text:style-name="T13">Interpretation</text:span></text:p>
          <draw:enhanced-geometry svg:viewBox="0 0 21600 21600" draw:type="rectangle" draw:enhanced-path="M 0 0 L 21600 0 21600 21600 0 21600 0 0 Z N"/>
        </draw:custom-shape>
        <draw:custom-shape draw:name="Text 31" draw:style-name="gr4" draw:text-style-name="P6" draw:layer="layout" svg:width="12.191cm" svg:height="3.174cm" svg:x="2.184cm" svg:y="8.763cm">
          <text:list text:style-name="L3">
            <text:list-item>
              <text:p text:style-name="P2"><text:span text:style-name="T20">Beide Modelle profitieren stark von Lag-/Rolling-Features.</text:span></text:p>
            </text:list-item>
            <text:list-item>
              <text:p text:style-name="P2"><text:span text:style-name="T20">XGBoost liefert die beste MAE, LightGBM ist fast gleich gut und schneller.</text:span></text:p>
            </text:list-item>
            <text:list-item>
              <text:p text:style-name="P2"><text:span text:style-name="T20">R² ≈ 0,97 ist gut, aber Feiertagsfehler müssen separat betrachtet werden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Image 0" draw:style-name="gr27" draw:text-style-name="P13" draw:layer="layout" svg:width="7cm" svg:height="4.18cm" svg:x="16.021cm" svg:y="3.93cm">
          <draw:image xlink:href="Pictures/100002010000022300000147150249BA.png" xlink:type="simple" xlink:show="embed" xlink:actuate="onLoad">
            <text:p/>
          </draw:image>
        </draw:frame>
        <draw:frame draw:name="Image 1" draw:style-name="gr27" draw:text-style-name="P13" draw:layer="layout" svg:width="7cm" svg:height="4.18cm" svg:x="24.377cm" svg:y="3.93cm">
          <draw:image xlink:href="Pictures/1000020100000223000001476FC2C542.png" xlink:type="simple" xlink:show="embed" xlink:actuate="onLoad">
            <text:p/>
          </draw:image>
        </draw:frame>
        <draw:custom-shape draw:name="Text 35" draw:style-name="gr4" draw:text-style-name="P6" draw:layer="layout" svg:width="17.271cm" svg:height="1.218cm" svg:x="15.621cm" svg:y="9.109cm">
          <text:p text:style-name="P2"><text:span text:style-name="T25">Lernkurven: </text:span></text:p>
          <text:p text:style-name="P2"><text:span text:style-name="T25">Validierungsfehler sinkt mit mehr Daten, der Gap zum Trainingsfehler bleibt aber sichtbar.</text:span></text:p>
          <draw:enhanced-geometry svg:viewBox="0 0 21600 21600" draw:type="rectangle" draw:enhanced-path="M 0 0 L 21600 0 21600 21600 0 21600 0 0 Z N"/>
        </draw:custom-shape>
        <draw:custom-shape draw:name="Shape 36" draw:style-name="gr36" draw:text-style-name="P1" draw:layer="layout" svg:width="17.398cm" svg:height="3.301cm" svg:x="15.621cm" svg:y="11.5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37" draw:style-name="gr4" draw:text-style-name="P5" draw:layer="layout" svg:width="12.055cm" svg:height="0.71cm" svg:x="16.205cm" svg:y="12.152cm">
          <text:p text:style-name="P2"><text:span text:style-name="T26">Präsentationsverbesserung</text:span></text:p>
          <draw:enhanced-geometry svg:viewBox="0 0 21600 21600" draw:type="rectangle" draw:enhanced-path="M 0 0 L 21600 0 21600 21600 0 21600 0 0 Z N"/>
        </draw:custom-shape>
        <draw:custom-shape draw:name="Text 38" draw:style-name="gr4" draw:text-style-name="P6" draw:layer="layout" svg:width="15.747cm" svg:height="1.142cm" svg:x="16.205cm" svg:y="13.143cm">
          <text:p text:style-name="P2"><text:span text:style-name="T27">Die Tabelle zeigt jetzt klar die primäre Metrik (MAE), die Nebenmetrik (RMSE) und Laufzeit. So wirkt die Modellentscheidung nachvollziehbarer.</text:span></text:p>
          <draw:enhanced-geometry svg:viewBox="0 0 21600 21600" draw:type="rectangle" draw:enhanced-path="M 0 0 L 21600 0 21600 21600 0 21600 0 0 Z N"/>
        </draw:custom-shape>
        <draw:custom-shape draw:name="Text 39" draw:style-name="gr4" draw:text-style-name="P6" draw:layer="layout" svg:width="17.779cm" svg:height="0.558cm" svg:x="1.524cm" svg:y="18.136cm">
          <text:p text:style-name="P2"><text:span text:style-name="T14">electricity_demand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40" draw:style-name="gr4" draw:text-style-name="P6" draw:layer="layout" svg:width="1.269cm" svg:height="0.558cm" svg:x="31.115cm" svg:y="18.136cm">
          <text:p text:style-name="P11"><text:span text:style-name="T14">6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0" draw:layer="layout" svg:width="15.239cm" svg:height="8.572cm" svg:x="1.905cm" svg:y="3.175cm" draw:page-number="6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mer&gt;</text:page-number></text:span></text:p>
            </draw:text-box>
          </draw:frame>
        </presentation:notes>
      </draw:page>
      <draw:page draw:name="Slide 7" draw:style-name="dp3" draw:master-page-name="Standard">
        <office:forms form:automatic-focus="false" form:apply-design-mode="false"/>
        <draw:custom-shape draw:name="Shape 0" draw:style-name="gr7" draw:text-style-name="P1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4" draw:text-style-name="P6" draw:layer="layout" svg:width="6.476cm" svg:height="0.609cm" svg:x="25.527cm" svg:y="0.813cm">
          <text:p text:style-name="P11"><text:span text:style-name="T8">ERKLÄRBARKEIT</text:span></text:p>
          <draw:enhanced-geometry svg:viewBox="0 0 21600 21600" draw:type="rectangle" draw:enhanced-path="M 0 0 L 21600 0 21600 21600 0 21600 0 0 Z N"/>
        </draw:custom-shape>
        <draw:custom-shape draw:name="Text 2" draw:style-name="gr4" draw:text-style-name="P12" draw:layer="layout" svg:width="23.494cm" svg:height="1.421cm" svg:x="1.524cm" svg:y="1.067cm">
          <text:p text:style-name="P2"><text:span text:style-name="T9">Feature Importances: Vorwoche schlägt Wetter</text:span></text:p>
          <draw:enhanced-geometry svg:viewBox="0 0 21600 21600" draw:type="rectangle" draw:enhanced-path="M 0 0 L 21600 0 21600 21600 0 21600 0 0 Z N"/>
        </draw:custom-shape>
        <draw:line draw:name="Shape 3" draw:style-name="gr12" draw:text-style-name="P13" draw:layer="layout" svg:x1="1.524cm" svg:y1="2.59cm" svg:x2="32.131cm" svg:y2="2.59cm">
          <text:p/>
        </draw:line>
        <draw:custom-shape draw:name="Shape 5" draw:style-name="gr37" draw:text-style-name="P1" draw:layer="layout" svg:width="7.093cm" svg:height="8.822cm" svg:x="24.885cm" svg:y="3.175cm">
          <text:p/>
          <draw:enhanced-geometry svg:viewBox="0 0 21600 21600" draw:path-stretchpoint-x="10800" draw:path-stretchpoint-y="10800" draw:text-areas="?f3 ?f4 ?f5 ?f6" draw:type="round-rectangle" draw:modifiers="2397.862867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6" draw:style-name="gr38" draw:text-style-name="P5" draw:layer="layout" svg:width="6.396cm" svg:height="0.863cm" svg:x="25.465cm" svg:y="3.437cm">
          <text:p text:style-name="P2"><text:span text:style-name="T28">Erkenntnisse</text:span></text:p>
          <draw:enhanced-geometry svg:viewBox="0 0 21600 21600" draw:type="rectangle" draw:enhanced-path="M 0 0 L 21600 0 21600 21600 0 21600 0 0 Z N"/>
        </draw:custom-shape>
        <draw:custom-shape draw:name="Text 7" draw:style-name="gr39" draw:text-style-name="P5" draw:layer="layout" svg:width="5.514cm" svg:height="5.702cm" svg:x="25.592cm" svg:y="5.2cm">
          <text:list text:style-name="L3">
            <text:list-item>
              <text:p text:style-name="P2"><text:span text:style-name="T21">Verbrauch der Vorwoche (`lag_168h`) ist der stärkste Saisonalitätsanker.</text:span></text:p>
            </text:list-item>
            <text:list-item>
              <text:p text:style-name="P2"><text:span text:style-name="T21">Tageswerte (`lag_24h`) und Rolling Means stabilisieren kurzfristige Schwankungen.</text:span></text:p>
            </text:list-item>
            <text:list-item>
              <text:p text:style-name="P2"><text:span text:style-name="T21">Wetterfeatures liefern Zusatzsignal, aber erklären nicht alles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8" draw:style-name="gr25" draw:text-style-name="P1" draw:layer="layout" svg:width="29.463cm" svg:height="2.159cm" svg:x="2.159cm" svg:y="14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9" draw:style-name="gr4" draw:text-style-name="P6" draw:layer="layout" svg:width="6.603cm" svg:height="0.71cm" svg:x="2.794cm" svg:y="14.984cm">
          <text:p text:style-name="P2"><text:span text:style-name="T29">Hinweis </text:span></text:p>
          <draw:enhanced-geometry svg:viewBox="0 0 21600 21600" draw:type="rectangle" draw:enhanced-path="M 0 0 L 21600 0 21600 21600 0 21600 0 0 Z N"/>
        </draw:custom-shape>
        <draw:custom-shape draw:name="Text 10" draw:style-name="gr40" draw:text-style-name="P5" draw:layer="layout" svg:width="28.363cm" svg:height="0.761cm" svg:x="2.794cm" svg:y="15.673cm">
          <text:p text:style-name="P2"><text:span text:style-name="T20">Feature Importance nicht als Kausalität interpretieren</text:span></text:p>
          <draw:enhanced-geometry svg:viewBox="0 0 21600 21600" draw:type="rectangle" draw:enhanced-path="M 0 0 L 21600 0 21600 21600 0 21600 0 0 Z N"/>
        </draw:custom-shape>
        <draw:custom-shape draw:name="Text 11" draw:style-name="gr4" draw:text-style-name="P6" draw:layer="layout" svg:width="17.779cm" svg:height="0.558cm" svg:x="1.524cm" svg:y="18.136cm">
          <text:p text:style-name="P2"><text:span text:style-name="T14">electricity_demand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12" draw:style-name="gr4" draw:text-style-name="P6" draw:layer="layout" svg:width="1.269cm" svg:height="0.558cm" svg:x="31.115cm" svg:y="18.136cm">
          <text:p text:style-name="P11"><text:span text:style-name="T14">7</text:span></text:p>
          <draw:enhanced-geometry svg:viewBox="0 0 21600 21600" draw:type="rectangle" draw:enhanced-path="M 0 0 L 21600 0 21600 21600 0 21600 0 0 Z N"/>
        </draw:custom-shape>
        <draw:frame draw:style-name="gr41" draw:text-style-name="P10" draw:layer="layout" svg:width="17.98cm" svg:height="11cm" svg:x="3.329cm" svg:y="3.212cm">
          <draw:image xlink:href="Pictures/1000000000000467000002B2B40CF180.png" xlink:type="simple" xlink:show="embed" xlink:actuate="onLoad">
            <text:p/>
          </draw:image>
        </draw:frame>
        <presentation:notes draw:style-name="dp2">
          <draw:page-thumbnail draw:name="Slide Image Placeholder 1" draw:style-name="gr10" draw:layer="layout" svg:width="15.239cm" svg:height="8.572cm" svg:x="1.905cm" svg:y="3.175cm" draw:page-number="7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mer&gt;</text:page-number></text:span></text:p>
            </draw:text-box>
          </draw:frame>
        </presentation:notes>
      </draw:page>
      <draw:page draw:name="page8" draw:style-name="dp3" draw:master-page-name="Standard">
        <office:forms form:automatic-focus="false" form:apply-design-mode="false"/>
        <draw:custom-shape draw:name="Shape 0" draw:style-name="gr7" draw:text-style-name="P1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4" draw:text-style-name="P20" draw:layer="layout" svg:width="6.476cm" svg:height="0.609cm" svg:x="25.527cm" svg:y="0.813cm">
          <text:p text:style-name="P11"><text:span text:style-name="T8">ANWENDUNG</text:span></text:p>
          <draw:enhanced-geometry svg:viewBox="0 0 21600 21600" draw:type="rectangle" draw:enhanced-path="M 0 0 L 21600 0 21600 21600 0 21600 0 0 Z N"/>
        </draw:custom-shape>
        <draw:custom-shape draw:name="Text 2" draw:style-name="gr4" draw:text-style-name="P17" draw:layer="layout" svg:width="28.721cm" svg:height="1.421cm" svg:x="1.524cm" svg:y="1.067cm">
          <text:p text:style-name="P2"><text:span text:style-name="T9">Tagesprognose für morgen: Interactive Notebook/Streamlit</text:span></text:p>
          <draw:enhanced-geometry svg:viewBox="0 0 21600 21600" draw:type="rectangle" draw:enhanced-path="M 0 0 L 21600 0 21600 21600 0 21600 0 0 Z N"/>
        </draw:custom-shape>
        <draw:line draw:name="Shape 3" draw:style-name="gr12" draw:text-style-name="P13" draw:layer="layout" svg:x1="1.524cm" svg:y1="2.59cm" svg:x2="32.131cm" svg:y2="2.59cm">
          <text:p/>
        </draw:line>
        <draw:custom-shape draw:name="Shape 5" draw:style-name="gr42" draw:text-style-name="P1" draw:layer="layout" svg:width="6.144cm" svg:height="5.968cm" svg:x="25.878cm" svg:y="3.175cm">
          <text:p/>
          <draw:enhanced-geometry svg:viewBox="0 0 21600 21600" draw:path-stretchpoint-x="10800" draw:path-stretchpoint-y="10800" draw:text-areas="?f3 ?f4 ?f5 ?f6" draw:type="round-rectangle" draw:modifiers="1733.35567096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6" draw:style-name="gr4" draw:text-style-name="P5" draw:layer="layout" svg:width="5.394cm" svg:height="0.863cm" svg:x="26.328cm" svg:y="3.461cm">
          <text:p text:style-name="P2"><text:span text:style-name="T28">Nutzen der GUI</text:span></text:p>
          <draw:enhanced-geometry svg:viewBox="0 0 21600 21600" draw:type="rectangle" draw:enhanced-path="M 0 0 L 21600 0 21600 21600 0 21600 0 0 Z N"/>
        </draw:custom-shape>
        <draw:custom-shape draw:name="Text 7" draw:style-name="gr43" draw:text-style-name="P21" draw:layer="layout" svg:width="5.392cm" svg:height="4.057cm" svg:x="26.33cm" svg:y="4.786cm">
          <text:list text:style-name="L3">
            <text:list-item>
              <text:p text:style-name="P2"><text:span text:style-name="T30">Tagesprognose sofort sichtbar</text:span></text:p>
            </text:list-item>
            <text:list-item>
              <text:p text:style-name="P2"><text:span text:style-name="T30">SMARD-Prognose als Referenz</text:span></text:p>
            </text:list-item>
            <text:list-item>
              <text:p text:style-name="P2"><text:span text:style-name="T30">Tabellarische Werte für Export/Prüfung</text:span></text:p>
            </text:list-item>
            <text:list-item>
              <text:p text:style-name="P2"><text:span text:style-name="T30">Modellwechsel möglich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8" draw:style-name="gr6" draw:text-style-name="P1" draw:layer="layout" svg:width="3.174cm" svg:height="2.666cm" svg:x="26.057cm" svg:y="9.7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9" draw:style-name="gr2" draw:text-style-name="P1" draw:layer="layout" svg:width="0.25cm" svg:height="1.5cm" svg:x="26.057cm" svg:y="9.792cm">
          <text:p/>
          <draw:enhanced-geometry svg:viewBox="0 0 21600 21600" draw:type="rectangle" draw:enhanced-path="M 0 0 L 21600 0 21600 21600 0 21600 0 0 Z N"/>
        </draw:custom-shape>
        <draw:custom-shape draw:name="Text 10" draw:style-name="gr4" draw:text-style-name="P22" draw:layer="layout" svg:width="2.285cm" svg:height="0.863cm" svg:x="26.692cm" svg:y="9.636cm">
          <text:p text:style-name="P2"><text:span text:style-name="T26">SMARD</text:span></text:p>
          <draw:enhanced-geometry svg:viewBox="0 0 21600 21600" draw:type="rectangle" draw:enhanced-path="M 0 0 L 21600 0 21600 21600 0 21600 0 0 Z N"/>
        </draw:custom-shape>
        <draw:custom-shape draw:name="Text 11" draw:style-name="gr4" draw:text-style-name="P23" draw:layer="layout" svg:width="2.285cm" svg:height="0.71cm" svg:x="26.692cm" svg:y="10.652cm">
          <text:p text:style-name="P2"><text:span text:style-name="T31">Vergleichslinie</text:span></text:p>
          <draw:enhanced-geometry svg:viewBox="0 0 21600 21600" draw:type="rectangle" draw:enhanced-path="M 0 0 L 21600 0 21600 21600 0 21600 0 0 Z N"/>
        </draw:custom-shape>
        <draw:custom-shape draw:name="Shape 12" draw:style-name="gr6" draw:text-style-name="P1" draw:layer="layout" svg:width="2.274cm" svg:height="2.666cm" svg:x="29.613cm" svg:y="9.7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3" draw:style-name="gr8" draw:text-style-name="P1" draw:layer="layout" svg:width="0.27cm" svg:height="1.5cm" svg:x="29.613cm" svg:y="9.809cm">
          <text:p/>
          <draw:enhanced-geometry svg:viewBox="0 0 21600 21600" draw:type="rectangle" draw:enhanced-path="M 0 0 L 21600 0 21600 21600 0 21600 0 0 Z N"/>
        </draw:custom-shape>
        <draw:custom-shape draw:name="Text 14" draw:style-name="gr4" draw:text-style-name="P22" draw:layer="layout" svg:width="2.158cm" svg:height="0.863cm" svg:x="30.248cm" svg:y="9.636cm">
          <text:p text:style-name="P2"><text:span text:style-name="T26">ML</text:span></text:p>
          <draw:enhanced-geometry svg:viewBox="0 0 21600 21600" draw:type="rectangle" draw:enhanced-path="M 0 0 L 21600 0 21600 21600 0 21600 0 0 Z N"/>
        </draw:custom-shape>
        <draw:custom-shape draw:name="Text 15" draw:style-name="gr4" draw:text-style-name="P23" draw:layer="layout" svg:width="2.158cm" svg:height="0.71cm" svg:x="30.248cm" svg:y="10.652cm">
          <text:p text:style-name="P2"><text:span text:style-name="T31">Prognose</text:span></text:p>
          <draw:enhanced-geometry svg:viewBox="0 0 21600 21600" draw:type="rectangle" draw:enhanced-path="M 0 0 L 21600 0 21600 21600 0 21600 0 0 Z N"/>
        </draw:custom-shape>
        <draw:custom-shape draw:name="Shape 16" draw:style-name="gr30" draw:text-style-name="P1" draw:layer="layout" svg:width="29.463cm" svg:height="2.234cm" svg:x="2.159cm" svg:y="13.7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17" draw:style-name="gr4" draw:text-style-name="P5" draw:layer="layout" svg:width="4.063cm" svg:height="0.71cm" svg:x="2.494cm" svg:y="14.064cm">
          <text:p text:style-name="P2"><text:span text:style-name="T29">Erkenntnis</text:span></text:p>
          <draw:enhanced-geometry svg:viewBox="0 0 21600 21600" draw:type="rectangle" draw:enhanced-path="M 0 0 L 21600 0 21600 21600 0 21600 0 0 Z N"/>
        </draw:custom-shape>
        <draw:custom-shape draw:name="Text 18" draw:style-name="gr44" draw:text-style-name="P5" draw:layer="layout" svg:width="27.873cm" svg:height="1.46cm" svg:x="2.486cm" svg:y="14.506cm">
          <text:p text:style-name="P2"><text:span text:style-name="T20">Tagesvorhersage folgt dem täglichen Muster. SMARD Prognose ist höher als die Vorhersage, eher konservativ. <text:s/></text:span></text:p>
          <draw:enhanced-geometry svg:viewBox="0 0 21600 21600" draw:type="rectangle" draw:enhanced-path="M 0 0 L 21600 0 21600 21600 0 21600 0 0 Z N"/>
        </draw:custom-shape>
        <draw:custom-shape draw:name="Text 19" draw:style-name="gr4" draw:text-style-name="P5" draw:layer="layout" svg:width="17.779cm" svg:height="0.558cm" svg:x="1.524cm" svg:y="18.136cm">
          <text:p text:style-name="P2"><text:span text:style-name="T14">electricity_demand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20" draw:style-name="gr4" draw:text-style-name="P20" draw:layer="layout" svg:width="1.269cm" svg:height="0.558cm" svg:x="31.115cm" svg:y="18.136cm">
          <text:p text:style-name="P11"><text:span text:style-name="T14">8</text:span></text:p>
          <draw:enhanced-geometry svg:viewBox="0 0 21600 21600" draw:type="rectangle" draw:enhanced-path="M 0 0 L 21600 0 21600 21600 0 21600 0 0 Z N"/>
        </draw:custom-shape>
        <draw:frame draw:style-name="gr45" draw:text-style-name="P10" draw:layer="layout" svg:width="22cm" svg:height="8.8cm" svg:x="2.032cm" svg:y="3.771cm">
          <draw:image xlink:href="Pictures/10000201000006610000028D6DCD5E16.png" xlink:type="simple" xlink:show="embed" xlink:actuate="onLoad">
            <text:p/>
          </draw:image>
        </draw:frame>
        <presentation:notes draw:style-name="dp2">
          <draw:page-thumbnail draw:name="Slide Image Placeholder 1" draw:style-name="gr10" draw:layer="layout" svg:width="15.239cm" svg:height="8.572cm" svg:x="1.905cm" svg:y="3.175cm" draw:page-number="8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mer&gt;</text:page-number></text:span></text:p>
            </draw:text-box>
          </draw:frame>
        </presentation:notes>
      </draw:page>
      <draw:page draw:name="Slide 9" draw:style-name="dp3" draw:master-page-name="Standard">
        <office:forms form:automatic-focus="false" form:apply-design-mode="false"/>
        <draw:custom-shape draw:name="Shape 5" draw:style-name="gr42" draw:text-style-name="P1" draw:layer="layout" svg:width="7.035cm" svg:height="6.905cm" svg:x="24.988cm" svg:y="3.176cm">
          <text:p/>
          <draw:enhanced-geometry svg:viewBox="0 0 21600 21600" draw:path-stretchpoint-x="10800" draw:path-stretchpoint-y="10800" draw:text-areas="?f3 ?f4 ?f5 ?f6" draw:type="round-rectangle" draw:modifiers="1733.35567096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0" draw:style-name="gr7" draw:text-style-name="P1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4" draw:text-style-name="P6" draw:layer="layout" svg:width="6.476cm" svg:height="0.609cm" svg:x="25.527cm" svg:y="0.813cm">
          <text:p text:style-name="P11"><text:span text:style-name="T8">EVALUIERUNG</text:span></text:p>
          <draw:enhanced-geometry svg:viewBox="0 0 21600 21600" draw:type="rectangle" draw:enhanced-path="M 0 0 L 21600 0 21600 21600 0 21600 0 0 Z N"/>
        </draw:custom-shape>
        <draw:custom-shape draw:name="Text 2" draw:style-name="gr4" draw:text-style-name="P12" draw:layer="layout" svg:width="23.494cm" svg:height="1.421cm" svg:x="1.524cm" svg:y="1.067cm">
          <text:p text:style-name="P2"><text:span text:style-name="T9">Historischer Vergleich: Real vs. SMARD vs. ML</text:span></text:p>
          <draw:enhanced-geometry svg:viewBox="0 0 21600 21600" draw:type="rectangle" draw:enhanced-path="M 0 0 L 21600 0 21600 21600 0 21600 0 0 Z N"/>
        </draw:custom-shape>
        <draw:line draw:name="Shape 3" draw:style-name="gr12" draw:text-style-name="P13" draw:layer="layout" svg:x1="1.524cm" svg:y1="2.59cm" svg:x2="32.131cm" svg:y2="2.59cm">
          <text:p/>
        </draw:line>
        <draw:custom-shape draw:name="Text 5" draw:style-name="gr4" draw:text-style-name="P5" draw:layer="layout" svg:width="6.083cm" svg:height="0.863cm" svg:x="25.492cm" svg:y="3.351cm">
          <text:p text:style-name="P2"><text:span text:style-name="T28">Nutzen der GUI</text:span></text:p>
          <draw:enhanced-geometry svg:viewBox="0 0 21600 21600" draw:type="rectangle" draw:enhanced-path="M 0 0 L 21600 0 21600 21600 0 21600 0 0 Z N"/>
        </draw:custom-shape>
        <draw:custom-shape draw:name="Text 6" draw:style-name="gr46" draw:text-style-name="P21" draw:layer="layout" svg:width="6.569cm" svg:height="5.451cm" svg:x="25.218cm" svg:y="4.448cm">
          <text:list text:style-name="L3">
            <text:list-item>
              <text:p text:style-name="P2"><text:span text:style-name="T30">Anfang und Ende der Zeit für die Vorhersage.</text:span></text:p>
            </text:list-item>
            <text:list-item>
              <text:p text:style-name="P2"><text:span text:style-name="T30">Man kann zwischen drei Modelle – LightGBM, XGBoost und RandomForest auswählen </text:span></text:p>
            </text:list-item>
            <text:list-item>
              <text:p text:style-name="P2"><text:span text:style-name="T30">Empfehlung: Feiertage und Ferienzeiten auswählen für die Sonderfällen</text:span></text:p>
            </text:list-item>
            <text:list-item>
              <text:p text:style-name="P2"><text:span text:style-name="T30">Vergleich mit SMARD Prognos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7" draw:style-name="gr6" draw:text-style-name="P1" draw:layer="layout" svg:width="3.174cm" svg:height="2.666cm" svg:x="24.892cm" svg:y="10.7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8" draw:style-name="gr24" draw:text-style-name="P1" draw:layer="layout" svg:width="0.25cm" svg:height="1.5cm" svg:x="24.892cm" svg:y="10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9" draw:style-name="gr4" draw:text-style-name="P24" draw:layer="layout" svg:width="2.285cm" svg:height="0.863cm" svg:x="25.527cm" svg:y="10.666cm">
          <text:p text:style-name="P2"><text:span text:style-name="T26">MAE</text:span></text:p>
          <draw:enhanced-geometry svg:viewBox="0 0 21600 21600" draw:type="rectangle" draw:enhanced-path="M 0 0 L 21600 0 21600 21600 0 21600 0 0 Z N"/>
        </draw:custom-shape>
        <draw:custom-shape draw:name="Text 10" draw:style-name="gr4" draw:text-style-name="P25" draw:layer="layout" svg:width="2.285cm" svg:height="0.71cm" svg:x="25.527cm" svg:y="11.682cm">
          <text:p text:style-name="P2"><text:span text:style-name="T31">Primäre Metrik</text:span></text:p>
          <draw:enhanced-geometry svg:viewBox="0 0 21600 21600" draw:type="rectangle" draw:enhanced-path="M 0 0 L 21600 0 21600 21600 0 21600 0 0 Z N"/>
        </draw:custom-shape>
        <draw:custom-shape draw:name="Shape 11" draw:style-name="gr6" draw:text-style-name="P1" draw:layer="layout" svg:width="3.174cm" svg:height="2.666cm" svg:x="28.448cm" svg:y="10.7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2" draw:style-name="gr7" draw:text-style-name="P1" draw:layer="layout" svg:width="0.25cm" svg:height="1.5cm" svg:x="28.448cm" svg:y="10.709cm">
          <text:p/>
          <draw:enhanced-geometry svg:viewBox="0 0 21600 21600" draw:type="rectangle" draw:enhanced-path="M 0 0 L 21600 0 21600 21600 0 21600 0 0 Z N"/>
        </draw:custom-shape>
        <draw:custom-shape draw:name="Text 13" draw:style-name="gr4" draw:text-style-name="P24" draw:layer="layout" svg:width="2.285cm" svg:height="0.863cm" svg:x="29.083cm" svg:y="10.566cm">
          <text:p text:style-name="P2"><text:span text:style-name="T26">RMSE</text:span></text:p>
          <draw:enhanced-geometry svg:viewBox="0 0 21600 21600" draw:type="rectangle" draw:enhanced-path="M 0 0 L 21600 0 21600 21600 0 21600 0 0 Z N"/>
        </draw:custom-shape>
        <draw:custom-shape draw:name="Text 14" draw:style-name="gr4" draw:text-style-name="P25" draw:layer="layout" svg:width="2.285cm" svg:height="0.71cm" svg:x="29.083cm" svg:y="11.582cm">
          <text:p text:style-name="P2"><text:span text:style-name="T31">Nebenmetrik</text:span></text:p>
          <draw:enhanced-geometry svg:viewBox="0 0 21600 21600" draw:type="rectangle" draw:enhanced-path="M 0 0 L 21600 0 21600 21600 0 21600 0 0 Z N"/>
        </draw:custom-shape>
        <draw:custom-shape draw:name="Shape 15" draw:style-name="gr47" draw:text-style-name="P1" draw:layer="layout" svg:width="29.463cm" svg:height="2.412cm" svg:x="2.159cm" svg:y="14.4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18" draw:style-name="gr4" draw:text-style-name="P6" draw:layer="layout" svg:width="17.779cm" svg:height="0.558cm" svg:x="1.524cm" svg:y="18.136cm">
          <text:p text:style-name="P2"><text:span text:style-name="T14">electricity_demand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19" draw:style-name="gr4" draw:text-style-name="P6" draw:layer="layout" svg:width="1.269cm" svg:height="0.558cm" svg:x="31.115cm" svg:y="18.136cm">
          <text:p text:style-name="P11"><text:span text:style-name="T14">9</text:span></text:p>
          <draw:enhanced-geometry svg:viewBox="0 0 21600 21600" draw:type="rectangle" draw:enhanced-path="M 0 0 L 21600 0 21600 21600 0 21600 0 0 Z N"/>
        </draw:custom-shape>
        <draw:custom-shape draw:name="Text 17" draw:style-name="gr48" draw:text-style-name="P5" draw:layer="layout" svg:width="4.063cm" svg:height="0.71cm" svg:x="2.494cm" svg:y="14.865cm">
          <text:p text:style-name="P2"><text:span text:style-name="T29">Erkenntnis</text:span></text:p>
          <draw:enhanced-geometry svg:viewBox="0 0 21600 21600" draw:type="rectangle" draw:enhanced-path="M 0 0 L 21600 0 21600 21600 0 21600 0 0 Z N"/>
        </draw:custom-shape>
        <draw:custom-shape draw:name="Text 18" draw:style-name="gr49" draw:text-style-name="P5" draw:layer="layout" svg:width="27.873cm" svg:height="1.46cm" svg:x="2.486cm" svg:y="15.307cm">
          <text:p text:style-name="P2"><text:span text:style-name="T20">Tagesvorhersage folgt dem täglichen Muster. SMARD Prognose ist höher als die Vorhersage, eher konservativ. <text:s/></text:span></text:p>
          <draw:enhanced-geometry svg:viewBox="0 0 21600 21600" draw:type="rectangle" draw:enhanced-path="M 0 0 L 21600 0 21600 21600 0 21600 0 0 Z N"/>
        </draw:custom-shape>
        <draw:frame draw:style-name="gr41" draw:text-style-name="P10" draw:layer="layout" svg:width="20cm" svg:height="8.44cm" svg:x="2.053cm" svg:y="3.437cm">
          <draw:image xlink:href="Pictures/10000201000005F800000285016D291D.png" xlink:type="simple" xlink:show="embed" xlink:actuate="onLoad">
            <text:p/>
          </draw:image>
        </draw:frame>
        <draw:frame draw:style-name="gr41" draw:text-style-name="P10" draw:layer="layout" svg:width="8.42cm" svg:height="2cm" svg:x="2.153cm" svg:y="12.135cm">
          <draw:image xlink:href="Pictures/10000201000002550000008EF97DABB2.png" xlink:type="simple" xlink:show="embed" xlink:actuate="onLoad">
            <text:p/>
          </draw:image>
        </draw:frame>
        <presentation:notes draw:style-name="dp2">
          <draw:page-thumbnail draw:name="Slide Image Placeholder 1" draw:style-name="gr10" draw:layer="layout" svg:width="15.239cm" svg:height="8.572cm" svg:x="1.905cm" svg:y="3.175cm" draw:page-number="9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mer&gt;</text:page-number></text:span></text:p>
            </draw:text-box>
          </draw:frame>
        </presentation:notes>
      </draw:page>
      <draw:page draw:name="Slide 10" draw:style-name="dp3" draw:master-page-name="Standard">
        <office:forms form:automatic-focus="false" form:apply-design-mode="false"/>
        <draw:custom-shape draw:name="Shape 0" draw:style-name="gr7" draw:text-style-name="P1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4" draw:text-style-name="P6" draw:layer="layout" svg:width="6.476cm" svg:height="0.609cm" svg:x="25.527cm" svg:y="0.813cm">
          <text:p text:style-name="P11"><text:span text:style-name="T8">ABSCHLUSS</text:span></text:p>
          <draw:enhanced-geometry svg:viewBox="0 0 21600 21600" draw:type="rectangle" draw:enhanced-path="M 0 0 L 21600 0 21600 21600 0 21600 0 0 Z N"/>
        </draw:custom-shape>
        <draw:custom-shape draw:name="Text 2" draw:style-name="gr4" draw:text-style-name="P12" draw:layer="layout" svg:width="23.494cm" svg:height="1.421cm" svg:x="1.524cm" svg:y="1.067cm">
          <text:p text:style-name="P2"><text:span text:style-name="T9">Fazit und Folgeprojekt</text:span></text:p>
          <draw:enhanced-geometry svg:viewBox="0 0 21600 21600" draw:type="rectangle" draw:enhanced-path="M 0 0 L 21600 0 21600 21600 0 21600 0 0 Z N"/>
        </draw:custom-shape>
        <draw:line draw:name="Shape 3" draw:style-name="gr12" draw:text-style-name="P13" draw:layer="layout" svg:x1="1.524cm" svg:y1="2.59cm" svg:x2="32.131cm" svg:y2="2.59cm">
          <text:p/>
        </draw:line>
        <draw:custom-shape draw:name="Shape 4" draw:style-name="gr50" draw:text-style-name="P1" draw:layer="layout" svg:width="14.223cm" svg:height="11.214cm" svg:x="2.159cm" svg:y="3.429cm">
          <text:p/>
          <draw:enhanced-geometry svg:viewBox="0 0 21600 21600" draw:path-stretchpoint-x="10800" draw:path-stretchpoint-y="10800" draw:text-areas="?f3 ?f4 ?f5 ?f6" draw:type="round-rectangle" draw:modifiers="1731.466785555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5" draw:style-name="gr4" draw:text-style-name="P6" draw:layer="layout" svg:width="5.587cm" svg:height="0.863cm" svg:x="2.921cm" svg:y="4.291cm">
          <text:p text:style-name="P2"><text:span text:style-name="T22">Projektfazit</text:span></text:p>
          <draw:enhanced-geometry svg:viewBox="0 0 21600 21600" draw:type="rectangle" draw:enhanced-path="M 0 0 L 21600 0 21600 21600 0 21600 0 0 Z N"/>
        </draw:custom-shape>
        <draw:custom-shape draw:name="Text 6" draw:style-name="gr4" draw:text-style-name="P6" draw:layer="layout" svg:width="12.445cm" svg:height="5.587cm" svg:x="2.921cm" svg:y="5.761cm">
          <text:list text:style-name="L3">
            <text:list-item>
              <text:p text:style-name="P2"><text:span text:style-name="T23">Das Projekt ist als Portfolio-Projekt gut positioniert: echte Daten, klare Pipeline, Modellvergleich und Demo-App.</text:span></text:p>
            </text:list-item>
            <text:list-item>
              <text:p text:style-name="P2"><text:span text:style-name="T23">Lag-/Rolling-Features sind der zentrale Performance-Treiber.</text:span></text:p>
            </text:list-item>
            <text:list-item>
              <text:p text:style-name="P2"><text:span text:style-name="T23">XGBoost/LightGBM sind derzeit die stärksten Kandidaten.</text:span></text:p>
            </text:list-item>
            <text:list-item>
              <text:p text:style-name="P2"><text:span text:style-name="T23">Der SMARD-Vergleich macht das Ergebnis praxisnah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7" draw:style-name="gr50" draw:text-style-name="P1" draw:layer="layout" svg:width="14.223cm" svg:height="11.214cm" svg:x="17.399cm" svg:y="3.4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9.901917075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8" draw:style-name="gr4" draw:text-style-name="P6" draw:layer="layout" svg:width="8.381cm" svg:height="0.863cm" svg:x="18.161cm" svg:y="4.291cm">
          <text:p text:style-name="P2"><text:span text:style-name="T22">Nächste Schritte</text:span></text:p>
          <draw:enhanced-geometry svg:viewBox="0 0 21600 21600" draw:type="rectangle" draw:enhanced-path="M 0 0 L 21600 0 21600 21600 0 21600 0 0 Z N"/>
        </draw:custom-shape>
        <draw:custom-shape draw:name="Text 9" draw:style-name="gr51" draw:text-style-name="P5" draw:layer="layout" svg:width="12.572cm" svg:height="4.575cm" svg:x="18.161cm" svg:y="5.761cm">
          <text:list text:style-name="L3">
            <text:list-item>
              <text:p text:style-name="P2"><text:span text:style-name="T25">Feiertags-/Brückentagsfehler separat evaluieren und Feature-Set erweitern.</text:span></text:p>
            </text:list-item>
            <text:list-item>
              <text:p text:style-name="P2"><text:span text:style-name="T25">Schulferienratio und Industrieproduktionsindex testen.</text:span></text:p>
            </text:list-item>
            <text:list-item>
              <text:p text:style-name="P2"><text:span text:style-name="T25">Direkte 24h-/7-Tage-Horizonte mit Walk-forward-Validierung prüfen.</text:span></text:p>
            </text:list-item>
            <text:list-item>
              <text:p text:style-name="P2"><text:span text:style-name="T25">README um Screenshots, Datenflussgrafik, Modellkarte und Reproduzierbarkeit ergänzen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10" draw:style-name="gr52" draw:text-style-name="P1" draw:layer="layout" svg:width="27.177cm" svg:height="1.542cm" svg:x="2.921cm" svg:y="15.3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11" draw:style-name="gr4" draw:text-style-name="P26" draw:layer="layout" svg:width="26.771cm" svg:height="1.162cm" svg:x="3.124cm" svg:y="15.601cm">
          <text:p text:style-name="P2"><text:span text:style-name="T12">To be continued: </text:span></text:p>
          <text:p text:style-name="P2"><text:span text:style-name="T6"><text:tab/></text:span><text:span text:style-name="T6">Residuallast = Netzlast − PV − Wind − konventionelle Erzeugung</text:span></text:p>
          <draw:enhanced-geometry svg:viewBox="0 0 21600 21600" draw:type="rectangle" draw:enhanced-path="M 0 0 L 21600 0 21600 21600 0 21600 0 0 Z N"/>
        </draw:custom-shape>
        <draw:custom-shape draw:name="Text 12" draw:style-name="gr4" draw:text-style-name="P6" draw:layer="layout" svg:width="17.779cm" svg:height="0.558cm" svg:x="1.524cm" svg:y="18.136cm">
          <text:p text:style-name="P2"><text:span text:style-name="T14">electricity_demand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13" draw:style-name="gr4" draw:text-style-name="P6" draw:layer="layout" svg:width="1.269cm" svg:height="0.558cm" svg:x="31.115cm" svg:y="18.136cm">
          <text:p text:style-name="P11"><text:span text:style-name="T14">1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0" draw:layer="layout" svg:width="15.239cm" svg:height="8.572cm" svg:x="1.905cm" svg:y="3.175cm" draw:page-number="10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Aptos" fo:font-size="32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000000" style:text-line-through-style="none" fo:font-family="Apto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000000" style:text-line-through-style="none" fo:font-family="Apto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000000" style:text-line-through-style="none" fo:font-family="Apto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Aptos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33.86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30.478cm" svg:height="3.18cm" svg:x="1.693cm" svg:y="0.76cm" presentation:class="title" presentation:placeholder="true">
        <draw:text-box/>
      </draw:frame>
      <draw:frame presentation:style-name="Standard-outline1" draw:layer="backgroundobjects" svg:width="30.478cm" svg:height="12.572cm" svg:x="1.693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6-05-21T00:08:22.27</dc:date>
    <dc:creator>Yuchuan </dc:creator>
    <meta:generator>OpenOffice/4.1.15$Win32 OpenOffice.org_project/4115m2$Build-9813</meta:generator>
    <meta:editing-duration>PT7H7M18S</meta:editing-duration>
    <meta:editing-cycles>34</meta:editing-cycles>
    <meta:document-statistic meta:object-count="263"/>
  </office:meta>
</office:document-meta>
</file>